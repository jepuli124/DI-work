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1B4000000BC0C3DE0B5.png" manifest:media-type="image/png"/>
  <manifest:file-entry manifest:full-path="Pictures/100000010000046E0000035E35A7AC6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0951in" fo:margin-left="0.0035in" fo:margin-top="0in" fo:margin-bottom="0in" table:align="left" style:writing-mode="lr-tb"/>
    </style:style>
    <style:style style:name="Table1.A" style:family="table-column">
      <style:table-column-properties style:column-width="3.0472in"/>
    </style:style>
    <style:style style:name="Table1.B" style:family="table-column">
      <style:table-column-properties style:column-width="3.04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LUT_20_Normal_20_Times_20_New_20_Roman_20_12">
      <style:text-properties fo:background-color="#ffff00"/>
    </style:style>
    <style:style style:name="P2" style:family="paragraph" style:parent-style-name="LUT_20_Normal_20_Times_20_New_20_Roman_20_12">
      <style:paragraph-properties fo:margin-top="0in" fo:margin-bottom="0.111in" style:contextual-spacing="false" fo:break-before="page"/>
    </style:style>
    <style:style style:name="P3" style:family="paragraph" style:parent-style-name="LUT_20_Normal_20_Times_20_New_20_Roman_20_12">
      <style:paragraph-properties fo:margin-top="0in" fo:margin-bottom="0.111in" style:contextual-spacing="false" fo:line-height="100%" fo:break-before="page"/>
      <style:text-properties officeooo:paragraph-rsid="0006c59e"/>
    </style:style>
    <style:style style:name="P4" style:family="paragraph" style:parent-style-name="LUT_20_Normal_20_Times_20_New_20_Roman_20_12">
      <style:paragraph-properties fo:line-height="100%"/>
      <style:text-properties officeooo:paragraph-rsid="0006c59e"/>
    </style:style>
    <style:style style:name="P5" style:family="paragraph" style:parent-style-name="LUT_20_Normal_20_Times_20_New_20_Roman_20_12">
      <style:paragraph-properties fo:line-height="100%"/>
      <style:text-properties fo:language="en" fo:country="US" officeooo:paragraph-rsid="0006c59e"/>
    </style:style>
    <style:style style:name="P6" style:family="paragraph" style:parent-style-name="Standard">
      <style:text-properties officeooo:paragraph-rsid="0006c59e"/>
    </style:style>
    <style:style style:name="P7" style:family="paragraph" style:parent-style-name="LUT_20_Normal_20_Times_20_New_20_Roman_20_12">
      <style:paragraph-properties fo:line-height="100%"/>
    </style:style>
    <style:style style:name="P8" style:family="paragraph" style:parent-style-name="LUT_20_Normal_20_Times_20_New_20_Roman_20_12">
      <style:paragraph-properties fo:line-height="100%"/>
      <style:text-properties fo:font-weight="bold" style:font-weight-asian="bold" style:font-weight-complex="bold"/>
    </style:style>
    <style:style style:name="P9" style:family="paragraph" style:parent-style-name="LUT_20_Normal_20_Times_20_New_20_Roman_20_12">
      <style:text-properties fo:language="en" fo:country="US"/>
    </style:style>
    <style:style style:name="P10" style:family="paragraph" style:parent-style-name="LUT_20_Normal_20_Times_20_New_20_Roman_20_12">
      <style:paragraph-properties fo:margin-top="0in" fo:margin-bottom="0.111in" style:contextual-spacing="false" fo:break-before="page"/>
      <style:text-properties fo:language="en" fo:country="US" style:script-type="latin"/>
    </style:style>
    <style:style style:name="P11" style:family="paragraph" style:parent-style-name="LUT_20_Normal_20_Times_20_New_20_Roman_20_12">
      <style:text-properties fo:language="en" fo:country="US" officeooo:rsid="0002fc26" officeooo:paragraph-rsid="0002fc26" style:script-type="latin"/>
    </style:style>
    <style:style style:name="P12" style:family="paragraph" style:parent-style-name="LUT_20_Normal_20_Times_20_New_20_Roman_20_12">
      <style:text-properties fo:language="en" fo:country="US" officeooo:rsid="0006db37" officeooo:paragraph-rsid="0006db37" style:script-type="latin"/>
    </style:style>
    <style:style style:name="P13" style:family="paragraph" style:parent-style-name="LUT_20_Normal_20_Times_20_New_20_Roman_20_12">
      <style:text-properties fo:language="en" fo:country="US" officeooo:rsid="0011461e" officeooo:paragraph-rsid="0011461e" style:script-type="latin"/>
    </style:style>
    <style:style style:name="P14" style:family="paragraph" style:parent-style-name="LUT_20_Normal_20_Times_20_New_20_Roman_20_12" style:master-page-name="Converted1">
      <style:paragraph-properties style:page-number="8"/>
    </style:style>
    <style:style style:name="P15" style:family="paragraph" style:parent-style-name="LUT_20_Normal_20_Times_20_New_20_Roman_20_12">
      <style:text-properties officeooo:paragraph-rsid="0006c59e"/>
    </style:style>
    <style:style style:name="P16" style:family="paragraph" style:parent-style-name="LUT_20_Normal_20_Times_20_New_20_Roman_20_12">
      <style:text-properties officeooo:rsid="0006c59e" officeooo:paragraph-rsid="0006c59e"/>
    </style:style>
    <style:style style:name="P17" style:family="paragraph" style:parent-style-name="Contents_20_1">
      <style:paragraph-properties>
        <style:tab-stops>
          <style:tab-stop style:position="6.1016in" style:type="right" style:leader-style="dotted" style:leader-text="."/>
        </style:tab-stops>
      </style:paragraph-properties>
    </style:style>
    <style:style style:name="P18" style:family="paragraph" style:parent-style-name="Contents_20_2">
      <style:paragraph-properties>
        <style:tab-stops>
          <style:tab-stop style:position="6.1016in" style:type="right" style:leader-style="dotted" style:leader-text="."/>
        </style:tab-stops>
      </style:paragraph-properties>
    </style:style>
    <style:style style:name="P19" style:family="paragraph" style:parent-style-name="LUT_20_Heading_20_1" style:list-style-name="WWNum10">
      <style:paragraph-properties fo:margin-top="0in" fo:margin-bottom="0.5in" style:contextual-spacing="false" fo:break-before="page"/>
      <style:text-properties fo:language="en" fo:country="US" officeooo:rsid="0002fc6c" officeooo:paragraph-rsid="0002fc6c" style:script-type="latin"/>
    </style:style>
    <style:style style:name="P20" style:family="paragraph" style:parent-style-name="LUT_20_Normal_20_Times_20_New_20_Roman_20_12">
      <style:text-properties officeooo:paragraph-rsid="000c550f"/>
    </style:style>
    <style:style style:name="P21" style:family="paragraph" style:parent-style-name="LUT_20_Normal_20_Times_20_New_20_Roman_20_12">
      <style:text-properties fo:language="en" fo:country="US" officeooo:rsid="000ba073" officeooo:paragraph-rsid="000c550f" style:script-type="latin"/>
    </style:style>
    <style:style style:name="P22" style:family="paragraph" style:parent-style-name="LUT_20_Normal_20_Times_20_New_20_Roman_20_12">
      <style:text-properties fo:language="en" fo:country="US" officeooo:rsid="000c550f" officeooo:paragraph-rsid="000c550f" style:script-type="latin"/>
    </style:style>
    <style:style style:name="P23" style:family="paragraph" style:parent-style-name="LUT_20_Normal_20_Times_20_New_20_Roman_20_12">
      <style:text-properties fo:language="en" fo:country="US" officeooo:rsid="000ba073" officeooo:paragraph-rsid="000d7086" style:script-type="latin"/>
    </style:style>
    <style:style style:name="P24" style:family="paragraph" style:parent-style-name="LUT_20_Normal_20_Times_20_New_20_Roman_20_12">
      <style:text-properties fo:language="en" fo:country="US" officeooo:rsid="000d7086" officeooo:paragraph-rsid="000d7086" style:script-type="latin"/>
    </style:style>
    <style:style style:name="P25" style:family="paragraph" style:parent-style-name="LUT_20_Normal_20_Times_20_New_20_Roman_20_12">
      <style:text-properties fo:language="en" fo:country="US" style:script-type="latin"/>
    </style:style>
    <style:style style:name="P26" style:family="paragraph" style:parent-style-name="LUT_20_Normal_20_Times_20_New_20_Roman_20_12">
      <style:text-properties fo:language="en" fo:country="US" officeooo:rsid="00071ad9" officeooo:paragraph-rsid="00071ad9" style:script-type="latin"/>
    </style:style>
    <style:style style:name="P27" style:family="paragraph" style:parent-style-name="LUT_20_Heading_20_2" style:list-style-name="WWNum10">
      <style:text-properties fo:language="en" fo:country="US" officeooo:rsid="00085f08" officeooo:paragraph-rsid="00085f08" style:script-type="latin"/>
    </style:style>
    <style:style style:name="P28" style:family="paragraph" style:parent-style-name="LUT_20_Normal_20_Times_20_New_20_Roman_20_12">
      <style:text-properties fo:language="en" fo:country="US" officeooo:rsid="0009c571" officeooo:paragraph-rsid="0009c571" style:script-type="latin"/>
    </style:style>
    <style:style style:name="P29" style:family="paragraph" style:parent-style-name="LUT_20_Normal_20_Times_20_New_20_Roman_20_12">
      <style:text-properties officeooo:paragraph-rsid="0013056e"/>
    </style:style>
    <style:style style:name="P30" style:family="paragraph" style:parent-style-name="LUT_20_Heading_20_2">
      <style:text-properties fo:language="en" fo:country="US" officeooo:rsid="00085f08" officeooo:paragraph-rsid="00085f08" style:script-type="latin"/>
    </style:style>
    <style:style style:name="P31" style:family="paragraph" style:parent-style-name="LUT_20_Heading_20_1">
      <style:paragraph-properties fo:break-before="page"/>
      <style:text-properties fo:language="en" fo:country="US" style:script-type="latin"/>
    </style:style>
    <style:style style:name="P32" style:family="paragraph" style:parent-style-name="LUT_20_Normal_20_Times_20_New_20_Roman_20_12">
      <style:text-properties fo:language="en" fo:country="US" officeooo:rsid="0002fc6c" officeooo:paragraph-rsid="0002fc6c" style:script-type="latin"/>
    </style:style>
    <style:style style:name="P33" style:family="paragraph" style:parent-style-name="LUT_20_Heading_20_2">
      <style:text-properties officeooo:rsid="00137d37" officeooo:paragraph-rsid="00137d37"/>
    </style:style>
    <style:style style:name="P34" style:family="paragraph" style:parent-style-name="LUT_20_Heading_20_1">
      <style:paragraph-properties fo:break-before="page"/>
      <style:text-properties fo:language="en" fo:country="US" officeooo:rsid="0006b88f" officeooo:paragraph-rsid="0006b88f" style:script-type="latin"/>
    </style:style>
    <style:style style:name="P35" style:family="paragraph" style:parent-style-name="LUT_20_Normal_20_Times_20_New_20_Roman_20_12">
      <style:text-properties fo:language="en" fo:country="US" officeooo:rsid="0006b88f" officeooo:paragraph-rsid="0006b88f" style:script-type="latin"/>
    </style:style>
    <style:style style:name="P36" style:family="paragraph" style:parent-style-name="LUT_20_Heading_20_1">
      <style:paragraph-properties fo:break-before="page"/>
      <style:text-properties fo:language="en" fo:country="US" officeooo:rsid="0006c59e" officeooo:paragraph-rsid="0006c59e" style:script-type="latin"/>
    </style:style>
    <style:style style:name="P37" style:family="paragraph" style:parent-style-name="LUT_20_Normal_20_Times_20_New_20_Roman_20_12">
      <style:text-properties fo:language="en" fo:country="US" officeooo:rsid="0006c59e" officeooo:paragraph-rsid="0006c59e" style:script-type="latin"/>
    </style:style>
    <style:style style:name="P38" style:family="paragraph" style:parent-style-name="LUT_20_Heading_20_1" style:list-style-name="WWNum10">
      <style:paragraph-properties fo:margin-top="0in" fo:margin-bottom="0.5in" style:contextual-spacing="false" fo:break-before="page"/>
      <style:text-properties fo:language="en" fo:country="US" officeooo:rsid="0006c59e" officeooo:paragraph-rsid="0006c59e" style:script-type="latin"/>
    </style:style>
    <style:style style:name="P39" style:family="paragraph" style:parent-style-name="LUT_20_Heading_20_1">
      <style:paragraph-properties fo:break-before="page"/>
      <style:text-properties fo:language="en" fo:country="US" officeooo:rsid="000f4a61" officeooo:paragraph-rsid="000f4a61" style:script-type="latin"/>
    </style:style>
    <style:style style:name="P40" style:family="paragraph" style:parent-style-name="LUT_20_Heading">
      <style:paragraph-properties fo:margin-left="0.3937in" fo:margin-top="0in" fo:margin-bottom="0.5in" style:contextual-spacing="false" fo:text-indent="0in" style:auto-text-indent="false" fo:break-before="page"/>
    </style:style>
    <style:style style:name="P41" style:family="paragraph" style:parent-style-name="LUT_20_Normal_20_Times_20_New_20_Roman_20_12">
      <style:paragraph-properties fo:margin-top="0in" fo:margin-bottom="0.111in" style:contextual-spacing="false"/>
    </style:style>
    <style:style style:name="P42" style:family="paragraph" style:parent-style-name="LUT_20_Liitteet" style:master-page-name="Converted2">
      <style:paragraph-properties style:page-number="1"/>
    </style:style>
    <style:style style:name="P43" style:family="paragraph" style:parent-style-name="LUT_20_Normal_20_Times_20_New_20_Roman_20_12" style:list-style-name="WWNum11"/>
    <style:style style:name="P44" style:family="paragraph" style:parent-style-name="LUT_20_Liitteet" style:master-page-name="Converted3">
      <style:paragraph-properties style:page-number="1"/>
    </style:style>
    <style:style style:name="P45" style:family="paragraph" style:parent-style-name="LUT_20_Liitteet" style:master-page-name="Converted4">
      <style:paragraph-properties style:page-number="1"/>
    </style:style>
    <style:style style:name="P46" style:family="paragraph" style:parent-style-name="LUT_20_Normal_20_Times_20_New_20_Roman_20_12">
      <style:paragraph-properties fo:margin-top="0in" fo:margin-bottom="0in" style:contextual-spacing="false" fo:line-height="115%" fo:text-align="center" style:justify-single-word="false" fo:orphans="2" fo:widows="2" loext:word-spacing-minimum="75%" loext:word-spacing-maximum="133%"/>
      <style:text-properties fo:language="fi" fo:country="FI" style:letter-kerning="false" style:font-name-asian="Calibri2" style:language-asian="en" style:country-asian="US" style:language-complex="ar" style:country-complex="SA"/>
    </style:style>
    <style:style style:name="P47" style:family="paragraph" style:parent-style-name="LUT_20_Normal_20_Times_20_New_20_Roman_20_12">
      <style:paragraph-properties fo:margin-left="0.9055in" fo:text-align="center" style:justify-single-word="false" fo:text-indent="0.9055in" style:auto-text-indent="false" loext:word-spacing-minimum="75%" loext:word-spacing-maximum="133%"/>
    </style:style>
    <style:style style:name="P48" style:family="paragraph" style:parent-style-name="LUT_20_Normal_20_Times_20_New_20_Roman_20_12" style:list-style-name="WWNum8"/>
    <style:style style:name="P49" style:family="paragraph" style:parent-style-name="LUT_20_Normal_20_Times_20_New_20_Roman_20_12">
      <style:paragraph-properties fo:margin-left="0.5in"/>
    </style:style>
    <style:style style:name="P50" style:family="paragraph" style:parent-style-name="LUT_20_Liitteet" style:master-page-name="Converted5">
      <style:paragraph-properties style:page-number="1"/>
    </style:style>
    <style:style style:name="P51" style:family="paragraph" style:parent-style-name="LUT_20_Liitteet">
      <style:paragraph-properties fo:margin-top="0in" fo:margin-bottom="0.3335in" style:contextual-spacing="false" fo:break-before="page"/>
    </style:style>
    <style:style style:name="P52" style:family="paragraph" style:parent-style-name="LUT_20_Normal_20_Times_20_New_20_Roman_20_12" style:list-style-name="WWNum9"/>
    <style:style style:name="T1" style:family="text">
      <style:text-properties fo:font-weight="bold" fo:background-color="#ffff00" loext:char-shading-value="0" style:font-weight-asian="bold" style:font-weight-complex="bold"/>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officeooo:rsid="0011461e"/>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per 58%"/>
    </style:style>
    <style:style style:name="T10" style:family="text">
      <style:text-properties fo:font-family="Symbol" style:font-family-generic="roman" style:font-pitch="variable" style:font-charset="x-symbol" fo:font-style="italic" style:font-family-asian="Symbol" style:font-family-generic-asian="system" style:font-pitch-asian="variable" style:font-style-asian="italic" style:font-family-complex="Symbol" style:font-family-generic-complex="system" style:font-pitch-complex="variable"/>
    </style:style>
    <style:style style:name="T11" style:family="text">
      <style:text-properties fo:font-family="Symbol" style:font-family-generic="roman" style:font-pitch="variable" style:font-charset="x-symbol" style:font-family-asian="Symbol" style:font-family-generic-asian="system" style:font-pitch-asian="variable" style:font-family-complex="Symbol" style:font-family-generic-complex="system" style:font-pitch-complex="variable"/>
    </style:style>
    <style:style style:name="T12" style:family="text">
      <style:text-properties fo:language="en" fo:country="US" officeooo:rsid="0009c571" style:script-type="latin"/>
    </style:style>
    <style:style style:name="T13" style:family="text">
      <style:text-properties fo:font-variant="normal" fo:text-transform="none" style:text-position="0% 100%" fo:language="en" fo:country="US" style:text-underline-style="none" fo:font-weight="normal" style:script-type="latin"/>
    </style:style>
    <style:style style:name="T14" style:family="text">
      <style:text-properties fo:font-variant="normal" fo:text-transform="none" style:text-position="0% 100%" fo:language="en" fo:country="US" fo:font-style="italic" style:text-underline-style="none" fo:font-weight="normal" style:font-style-asian="italic" style:script-type="latin"/>
    </style:style>
    <style:style style:name="T15" style:family="text">
      <style:text-properties fo:language="en" fo:country="US" style:script-type="latin"/>
    </style:style>
    <style:style style:name="T16" style:family="text">
      <style:text-properties fo:language="en" fo:country="US" officeooo:rsid="000c550f" style:script-type="latin"/>
    </style:style>
    <style:style style:name="T17" style:family="text">
      <style:text-properties fo:language="en" fo:country="US" officeooo:rsid="000ba073" style:script-type="latin"/>
    </style:style>
    <style:style style:name="T18" style:family="text">
      <style:text-properties officeooo:rsid="000c550f"/>
    </style:style>
    <style:style style:name="T19" style:family="text">
      <style:text-properties officeooo:rsid="000d7086"/>
    </style:style>
    <style:style style:name="T20" style:family="text">
      <style:text-properties officeooo:rsid="000f4a61"/>
    </style:style>
    <style:style style:name="T21" style:family="text">
      <style:text-properties officeooo:rsid="000525b3"/>
    </style:style>
    <style:style style:name="T22" style:family="text">
      <style:text-properties officeooo:rsid="00085f08"/>
    </style:style>
    <style:style style:name="T23" style:family="text">
      <style:text-properties officeooo:rsid="00137d37"/>
    </style:style>
    <style:style style:name="T24" style:family="text">
      <style:text-properties fo:language="en" fo:country="US" officeooo:rsid="0013056e" style:script-type="latin"/>
    </style:style>
    <style:style style:name="T25" style:family="text">
      <style:text-properties fo:language="en" fo:country="US" officeooo:rsid="00137d37" style:script-type="latin"/>
    </style:style>
    <style:style style:name="T26" style:family="text">
      <style:text-properties fo:language="en" fo:country="US" officeooo:rsid="0002fc6c" style:script-type="latin"/>
    </style:style>
    <style:style style:name="T27" style:family="text">
      <style:text-properties officeooo:rsid="0006db37"/>
    </style:style>
    <style:style style:name="T28" style:family="text">
      <style:text-properties officeooo:rsid="0006c59e"/>
    </style:style>
    <style:style style:name="T29" style:family="text">
      <style:text-properties fo:font-style="italic" style:font-style-asian="italic"/>
    </style:style>
    <style:style style:name="T30" style:family="text">
      <style:text-properties style:text-underline-style="solid" style:text-underline-width="auto" style:text-underline-color="font-color"/>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font-size-asian="10pt" style:font-size-complex="10pt"/>
    </style:style>
    <style:style style:name="T33" style:family="text">
      <style:text-properties style:font-name-asian="Times New Roman1"/>
    </style:style>
    <style:style style:name="T34" style:family="text">
      <style:text-properties fo:color="#000000" loext:opacity="100%"/>
    </style:style>
    <style:style style:name="T35" style:family="text">
      <style:text-properties fo:color="#000000" loext:opacity="100%" fo:font-style="italic" style:font-style-asian="italic" style:font-style-complex="italic"/>
    </style:style>
    <style:style style:name="T36" style:family="text">
      <style:text-properties fo:color="#000000" loext:opacity="100%" style:text-position="sub 58%" fo:background-color="#ffffff" loext:char-shading-value="0"/>
    </style:style>
    <style:style style:name="T37" style:family="text">
      <style:text-properties fo:color="#000000" loext:opacity="100%" fo:font-style="italic" fo:background-color="#ffffff" loext:char-shading-value="0" style:font-style-asian="italic" style:font-style-complex="italic"/>
    </style:style>
    <style:style style:name="T38" style:family="text">
      <style:text-properties fo:color="#000000" loext:opacity="100%" fo:background-color="#ffffff" loext:char-shading-value="0"/>
    </style:style>
    <style:style style:name="T39" style:family="text">
      <style:text-properties fo:color="#000000" loext:opacity="100%" style:text-position="sub 58%" fo:font-style="italic" fo:background-color="#ffffff" loext:char-shading-value="0" style:font-style-asian="italic" style:font-style-complex="italic"/>
    </style:style>
    <style:style style:name="T40" style:family="text">
      <style:text-properties fo:color="#000000" loext:opacity="100%" style:text-position="sub 58%" fo:background-color="#ffffff" loext:char-shading-value="0" style:font-style-complex="italic"/>
    </style:style>
    <style:style style:name="T41" style:family="text">
      <style:text-properties fo:color="#000000" loext:opacity="100%" fo:background-color="#ffffff" loext:char-shading-value="0" style:font-style-complex="italic"/>
    </style:style>
    <style:style style:name="T42" style:family="text">
      <style:text-properties fo:font-family="Symbol" style:font-family-generic="roman" style:font-pitch="variable" style:font-charset="x-symbol" fo:font-style="italic" style:font-family-asian="Symbol" style:font-family-generic-asian="system" style:font-pitch-asian="variable" style:font-style-asian="italic" style:font-family-complex="Symbol" style:font-family-generic-complex="system" style:font-pitch-complex="variable" style:font-style-complex="italic"/>
    </style:style>
    <style:style style:name="T43" style:family="text">
      <style:text-properties style:font-name="Calibri"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LUT_20_Normal_20_Times_20_New_20_Roman_20_12" loext:marker-style-name="T1"><text:span text:style-name="T1">Ohje LUTin opinnäytetyön mallipohjan käyttöön</text:span><text:span text:style-name="T1"/></text:p>
      <text:p text:style-name="LUT_20_Normal_20_Times_20_New_20_Roman_20_12" loext:marker-style-name="T2"><text:bookmark-start text:name="_Hlk80351997"/><text:span text:style-name="T2">Tämä dokumentti on pohja, jolle LUT-yliopiston opinnäytetyö (kandidaatintyö, kandidaatintutkielma, diplomityö tai pro gradu -tutkielma) voidaan kirjoittaa. Siinä on huomioitu opinnäytetyön sisällölle, rakenteelle ja tekstin asettelulle asetetut vaatimukset sekä LUTPubissa julkaistavalle aineistolle asetetut saavutettavuuskriteerit. Erityisen tärkeää on käyttää mallipohjan nimiölehti-, tiivistelmä-, sisällysluettelo-, lähdeluettelo- ja viittausohjeistusta.</text:span><text:span text:style-name="T2"/></text:p>
      <text:p text:style-name="P1" loext:marker-style-name="T2"/>
      <text:p text:style-name="LUT_20_Normal_20_Times_20_New_20_Roman_20_12" loext:marker-style-name="T2"><text:span text:style-name="T2">Mallipohjaa käytetään kaikissa 11.8.2021 jälkeen aloitetuissa opinnäytetöissä.</text:span><text:span text:style-name="T2"/></text:p>
      <text:p text:style-name="P1" loext:marker-style-name="T2"/>
      <text:p text:style-name="LUT_20_Normal_20_Times_20_New_20_Roman_20_12" loext:marker-style-name="T2"><text:span text:style-name="T2">Varsinainen mallipohja alkaa seuraavalta sivulta. Kirjoita oma opinnäytteesi mallipohjaan ja poista ohjetekstit (esim. tämä ohjesivu) ja muut mallipohjan sisällöt, joita et tarvitse. </text:span><text:span text:style-name="T2"/></text:p>
      <text:p text:style-name="LUT_20_Normal_20_Times_20_New_20_Roman_20_12" loext:marker-style-name="T2"><text:span text:style-name="T2">Tämän mallipohjan liitteissä on tärkeitä ohjeita käyttöösi, luethan nekin. </text:span><text:bookmark-start text:name="_Hlk90903460"/><text:span text:style-name="T2">Tarvittaessa opinnäytetyönohjaaja voi antaa lisäohjeita.</text:span><text:bookmark-end text:name="_Hlk90903460"/><text:span text:style-name="T2"/></text:p>
      <text:p text:style-name="P1" loext:marker-style-name="T2"><text:bookmark-end text:name="_Hlk80351997"/></text:p>
      <text:p text:style-name="LUT_20_Normal_20_Times_20_New_20_Roman_20_12" loext:marker-style-name="T2"><text:span text:style-name="T2">Perehdy muihinkin Lappeenrannan–Lahden teknillinen yliopiston julkaisemiin opinnäyte-työohjeisiin. </text:span><text:span text:style-name="T2"/></text:p>
      <text:p text:style-name="LUT_20_Normal_20_Times_20_New_20_Roman_20_12" loext:marker-style-name="T2"><text:span text:style-name="T2">• Opinnäytetyöohjeet </text:span><text:a xlink:type="simple" xlink:href="https://elut.lut.fi/fi/opintojen-suorittaminen/opinnaytetyo" text:style-name="Internet_20_link" text:visited-style-name="Visited_20_Internet_20_Link"><text:span text:style-name="Internet_20_link"><text:span text:style-name="T2">eLUT-sivustolla</text:span></text:span></text:a></text:p>
      <text:p text:style-name="LUT_20_Normal_20_Times_20_New_20_Roman_20_12" loext:marker-style-name="T2"><text:span text:style-name="T2">• LUT Tiedekirjasto, </text:span><text:a xlink:type="simple" xlink:href="https://www.lut.fi/kirjasto" text:style-name="Internet_20_link" text:visited-style-name="Visited_20_Internet_20_Link"><text:span text:style-name="Internet_20_link"><text:span text:style-name="T2">sivut opinnäytetyön tekijöille ja tutkijoille</text:span></text:span></text:a><text:span text:style-name="T2"> </text:span></text:p>
      <text:p text:style-name="LUT_20_Normal_20_Times_20_New_20_Roman_20_12" loext:marker-style-name="T2"><text:span text:style-name="T2">• LUT Tiedekirjasto Opinnäytetyön </text:span><text:a xlink:type="simple" xlink:href="https://libguides.lut.fi/tiedonhankinta" text:style-name="Internet_20_link" text:visited-style-name="Visited_20_Internet_20_Link"><text:span text:style-name="Internet_20_link"><text:span text:style-name="T2">tiedonhaun opas</text:span></text:span></text:a><text:span text:style-name="T2"> </text:span></text:p>
      <text:p text:style-name="LUT_20_Normal_20_Times_20_New_20_Roman_20_12" loext:marker-style-name="T2"><text:span text:style-name="T2">• LUT Tiedekirjasto, </text:span><text:a xlink:type="simple" xlink:href="https://libguides.lut.fi/tekijanoikeudet" text:style-name="Internet_20_link" text:visited-style-name="Visited_20_Internet_20_Link"><text:span text:style-name="Internet_20_link"><text:span text:style-name="T2">opas tekijänoikeuksista</text:span></text:span></text:a><text:span text:style-name="T2"> </text:span></text:p>
      <text:p text:style-name="LUT_20_Normal_20_Times_20_New_20_Roman_20_12" loext:marker-style-name="T2"><text:span text:style-name="T2">• LUT-yliopisto, </text:span><text:a xlink:type="simple" xlink:href="https://elut.lut.fi/fi/opintojen-suorittaminen/opintoja-ohjaavat-saadokset-ja-ohjeet/eettiset-pelisaannot" text:style-name="Internet_20_link" text:visited-style-name="Visited_20_Internet_20_Link"><text:span text:style-name="Internet_20_link"><text:span text:style-name="T2">eettiset pelisäännöt</text:span></text:span></text:a><text:span text:style-name="T2"> </text:span></text:p>
      <text:p text:style-name="LUT_20_Normal_20_Times_20_New_20_Roman_20_12"><text:span text:style-name="T2">• Plagioinnin tunnistuksen </text:span><text:a xlink:type="simple" xlink:href="https://elut.lut.fi/fi/it-ohjeet-opiskelun-tyokalut/turnitin" text:style-name="Internet_20_link" text:visited-style-name="Visited_20_Internet_20_Link"><text:span text:style-name="Internet_20_link"><text:span text:style-name="T2">Turnitin-ohjeet</text:span></text:span></text:a><text:span text:style-name="T2"> LUTin opiskelijalle</text:span></text:p>
      <text:p text:style-name="LUT_20_Normal_20_Times_20_New_20_Roman_20_12"><text:span text:style-name="T2">• Valmistumisprosessi ja ohjeet </text:span><text:a xlink:type="simple" xlink:href="https://elut.lut.fi/fi/valmistuminen" text:style-name="Internet_20_link" text:visited-style-name="Visited_20_Internet_20_Link"><text:span text:style-name="Internet_20_link"><text:span text:style-name="T2">eLUT-sivustolla</text:span></text:span></text:a></text:p>
      <text:p text:style-name="LUT_20_Normal_20_Times_20_New_20_Roman_20_12"/>
      <text:p text:style-name="P2"><draw:frame draw:style-name="fr1" draw:name="Picture 592533053" text:anchor-type="as-char" svg:width="1.9807in" svg:height="0.8543in" draw:z-index="0"><draw:image xlink:href="Pictures/10000001000001B4000000BC0C3DE0B5.png" xlink:type="simple" xlink:show="embed" xlink:actuate="onLoad" draw:mime-type="image/png"/><svg:desc>Logo LUT University

Description automatically generated</svg:desc></draw:frame></text:p>
      <text:p text:style-name="LUT_20_Normal_20_Times_20_New_20_Roman_20_12"/>
      <text:p text:style-name="LUT_20_Normal_20_Times_20_New_20_Roman_20_12"/>
      <text:p text:style-name="LUT_20_Normal_20_Times_20_New_20_Roman_20_12"/>
      <text:p text:style-name="LUT_20_Normal_20_Times_20_New_20_Roman_20_12"/>
      <text:p text:style-name="LUT_20_Normal_20_Times_20_New_20_Roman_20_12"/>
      <text:p text:style-name="LUT_20_Normal_20_Times_20_New_20_Roman_20_12"/>
      <text:p text:style-name="LUT_20_Normal_20_Times_20_New_20_Roman_20_12" loext:marker-style-name="T3"><text:span text:style-name="T3">OPINNÄYTETYÖN (KANDIDAATIN- TAI DIPLOMITYÖN/PRO GRADU -TUTKIELMAN, KANDIDAATINTUTKIELMAN) NIMI ISOILLA KIRJAIMILLA, LIHAVOITUNA, TASATTUNA VASEMMALLE; NIMI ALKAA NOIN 11 cm SIVUN YLÄLAIDASTA</text:span><text:span text:style-name="T3"/></text:p>
      <text:p text:style-name="LUT_20_Normal_20_Times_20_New_20_Roman_20_12">Mahdollinen alaotsikko</text:p>
      <text:p text:style-name="LUT_20_Normal_20_Times_20_New_20_Roman_20_12"/>
      <text:p text:style-name="LUT_20_Normal_20_Times_20_New_20_Roman_20_12"/>
      <text:p text:style-name="LUT_20_Normal_20_Times_20_New_20_Roman_20_12"/>
      <text:p text:style-name="LUT_20_Normal_20_Times_20_New_20_Roman_20_12"/>
      <text:p text:style-name="LUT_20_Normal_20_Times_20_New_20_Roman_20_12">Lappeenrannan–Lahden teknillinen yliopisto LUT</text:p>
      <text:p text:style-name="LUT_20_Normal_20_Times_20_New_20_Roman_20_12">Koulutusohjelmasi ja tutkielmasi (esim. Kauppatieteiden kandidaatintutkielma tai pro gradu -tutkielma / Konetekniikan kandidaatintyö tai diplomityö) </text:p>
      <text:p text:style-name="LUT_20_Normal_20_Times_20_New_20_Roman_20_12">202X </text:p>
      <text:p text:style-name="LUT_20_Normal_20_Times_20_New_20_Roman_20_12">Tekijän Etunimi Sukunimi</text:p>
      <text:p text:style-name="LUT_20_Normal_20_Times_20_New_20_Roman_20_12">Tarkastaja(t): Titteli (esim. Professori) Etunimi Sukunimi</text:p>
      <text:p text:style-name="LUT_20_Normal_20_Times_20_New_20_Roman_20_12"><text:s text:c="22"/>Titteli (esim. KTT) Etunimi Sukunimi</text:p>
      <text:p text:style-name="P3" loext:marker-style-name="T4"><text:span text:style-name="T4">ABSTRACT</text:span></text:p>
      <text:p text:style-name="P4" loext:marker-style-name="T4"><text:span text:style-name="T4">Lappeenranta–Lahti University of Technology LUT</text:span></text:p>
      <text:p text:style-name="P4" loext:marker-style-name="T4"><text:span text:style-name="T4">Your school: School of Business and Management / School of Energy Systems / School of Engineering Science</text:span></text:p>
      <text:p text:style-name="P4" loext:marker-style-name="T4"><text:span text:style-name="T4">Your degree programme: Business Administration / Chemical Engineering / Computational Engineering / Electrical Engineering / Energy Technology / Environmental Technology / Industrial Engineering and Management / Mechanical Engineering / Software Engineering</text:span></text:p>
      <text:p text:style-name="P5" loext:marker-style-name="T4"/>
      <text:p text:style-name="P4" loext:marker-style-name="T4"><text:span text:style-name="T4">Author’s name</text:span></text:p>
      <text:p text:style-name="P5" loext:marker-style-name="T4"/>
      <text:p text:style-name="P4" loext:marker-style-name="T5"><text:span text:style-name="T5">Title of the Thesis in English in bold print (possible subtitle included)</text:span></text:p>
      <text:p text:style-name="P5" loext:marker-style-name="T4"/>
      <text:p text:style-name="P4" loext:marker-style-name="T4"><text:span text:style-name="T4">Master’s/Bachelor’s thesis</text:span></text:p>
      <text:p text:style-name="P6" loext:marker-style-name="T4"><text:span text:style-name="T4">Year of completion of the thesis</text:span></text:p>
      <text:p text:style-name="P6" loext:marker-style-name="T4"><text:span text:style-name="T4">xx pages, xx figures, xx tables and xx appendices</text:span></text:p>
      <text:p text:style-name="P4" loext:marker-style-name="T4"><text:span text:style-name="T4">Examiners: Title First name Last name and Title First name Last name</text:span></text:p>
      <text:p text:style-name="P4" loext:marker-style-name="T4"><text:span text:style-name="T4">Keywords: List of words, ideas and topics that define what the content of your thesis is about</text:span></text:p>
      <text:p text:style-name="P5" loext:marker-style-name="T4"/>
      <text:p text:style-name="P4" loext:marker-style-name="T4"><text:span text:style-name="T4">Line spacing in the abstract is single and the text is aligned to both edges, as is the other breadtext of the thesis. The abstract is concise (one A4 sheet). It has to be understandable as such, without the original document. It explains the contents of the thesis: the objective, methodologies, results and conclusions. </text:span></text:p>
      <text:p text:style-name="P4" loext:marker-style-name="T4"><text:span text:style-name="T4">The abstract is a public document, and therefore all confidential information must be excluded from it. The sentences in a good abstract are complete, concise and precise. The author does not express his/her own opinions, but rather describes the thesis as an impartial reporter. No direct references to the original text are made.</text:span></text:p>
      <text:p text:style-name="P4" loext:marker-style-name="T4"><text:span text:style-name="T4">Students write the abstract in two languages: the language of their basic education (Finnish or Swedish) and English. Students who have not received their basic education in Finnish or Swedish write their abstract only in English.</text:span></text:p>
      <text:p text:style-name="P2"><text:bookmark-start text:name="_Hlk79401061"/>TIIVISTELMÄ</text:p>
      <text:p text:style-name="P7">Lappeenrannan–Lahden teknillinen yliopisto LUT</text:p>
      <text:p text:style-name="P7">Oma schoolisi: LUT-kauppakorkeakoulu/LUT Energiajärjestelmät/LUT Teknis-luonnontieteellinen</text:p>
      <text:p text:style-name="P7">Oma koulutusohjelmasi: Energiatekniikka / Kauppatieteet / Kemiantekniikka / Konetekniikka / Laskennallinen tekniikka / Sähkötekniikka / Tietotekniikka / Tuotantotalous / Ympäristötekniikka</text:p>
      <text:p text:style-name="P7"/>
      <text:p text:style-name="P7">Tekijän nimi</text:p>
      <text:p text:style-name="P7"/>
      <text:p text:style-name="P8">Työn suomenkielinen nimi lihavoituna (myös mahdollinen alaotsikko)</text:p>
      <text:p text:style-name="P7"/>
      <text:p text:style-name="P7">Koulutusohjelmasi ja tutkielmasi: esim. Kauppatieteiden pro gradu -tutkielma / Konetekniikan kandidaatintyö</text:p>
      <text:p text:style-name="P7">Vuosiluku</text:p>
      <text:p text:style-name="P7">xx sivua, xx kuvaa, xx taulukkoa ja xx liitettä</text:p>
      <text:p text:style-name="P7">Tarkastaja(t): Titteli Etunimi Sukunimi ja Titteli Etunimi Sukunimi</text:p>
      <text:p text:style-name="P7">Avainsanat: Listaa tähän avainsanat, joiden perusteella tutkielma voi haettaessa löytyä </text:p>
      <text:p text:style-name="P7"/>
      <text:p text:style-name="P7">Tiivistelmätekstin riviväli on 1, ja se tasataan molempiin reunoihin, kuten muukin opinnäytetyön leipäteksti. Tiivistelmätekstin tunnistetietoineen on mahduttava yhdelle A4-arkille. Tiivistelmään ei voi sisällyttää salassa pidettäviä tietoja, vaan se on aina laadittava julkiseksi.</text:p>
      <text:p text:style-name="P7">Tiivistelmä on itsenäinen esitys DI-työstä/pro gradu -tutkielmasta, ja sen tulee olla ymmärrettävissä sellaisenaan. Hyvässä tiivistelmässä virkkeet ovat täydellisiä, lyhyitä ja ytimekkäitä. Tekijän mielipiteet eivät näy, vaan hän kuvaa työtään kuin ulkopuolinen raportoija. Tiivistelmässä ei viitata yksityiskohtaisesti alkuperäistekstiin. Tutkimuksen keskeisimmät tulokset sisältyvät tiivistelmään.</text:p>
      <text:p text:style-name="P7">Opiskelijat, joiden koulusivistyskieli ei ole suomi tai ruotsi ja jotka kirjoittavat opinnäytteensä englanniksi, kirjoittavat tiivistelmän ainoastaan englanniksi.<text:bookmark-end text:name="_Hlk79401061"/></text:p>
      <text:p text:style-name="P9"/>
      <text:p text:style-name="P10">ACKNOWLEDGEMENTS</text:p>
      <text:p text:style-name="P11">I wish to thank you for opening this document. I appreciate your interest in something I have made. <text:span text:style-name="T6">My humblest t</text:span>hank you <text:span text:style-name="T6">to you dear reader</text:span>.</text:p>
      <text:p text:style-name="P12">An acknowledg<text:span text:style-name="T6">e</text:span>ment website?</text:p>
      <text:p text:style-name="P13">I will thank Bitwell Oy for the possibility to do this for them and for the salary they gave.</text:p>
      <text:p text:style-name="P13">Honorable mentions:</text:p>
      <text:p text:style-name="P13">A pet named Steve</text:p>
      <text:p text:style-name="P13">Your mom</text:p>
      <text:p text:style-name="P13">Tiny box Tim.</text:p>
      <text:p text:style-name="LUT_20_Normal_20_Times_20_New_20_Roman_20_12"/>
      <text:p text:style-name="P2">SYMBOLI- JA LYHENNELUETTELO (mahdollinen, ei relevantti kaikissa töissä)</text:p>
      <text:p text:style-name="LUT_20_Normal_20_Times_20_New_20_Roman_20_12"/>
      <text:p text:style-name="LUT_20_Normal_20_Times_20_New_20_Roman_20_12">Roomalaiset</text:p>
      <text:p text:style-name="LUT_20_Normal_20_Times_20_New_20_Roman_20_12"><text:span text:style-name="T7">p</text:span><text:tab/>paine<text:tab/><text:tab/>[bar, Pa]</text:p>
      <text:p text:style-name="LUT_20_Normal_20_Times_20_New_20_Roman_20_12"><text:span text:style-name="T7">q</text:span><text:span text:style-name="T8">m</text:span><text:tab/>massavirta<text:tab/><text:tab/>[kg/s]</text:p>
      <text:p text:style-name="LUT_20_Normal_20_Times_20_New_20_Roman_20_12"><text:span text:style-name="T7">R</text:span><text:tab/>ainekohtainen kaasuvakio<text:tab/>[J/(kg K)]</text:p>
      <text:p text:style-name="LUT_20_Normal_20_Times_20_New_20_Roman_20_12"><text:span text:style-name="T7">T</text:span><text:tab/>lämpötila<text:tab/><text:tab/>[ºC, K]</text:p>
      <text:p text:style-name="LUT_20_Normal_20_Times_20_New_20_Roman_20_12"><text:span text:style-name="T7">U</text:span> <text:tab/>jännite <text:tab/><text:tab/>[V]</text:p>
      <text:p text:style-name="LUT_20_Normal_20_Times_20_New_20_Roman_20_12"><text:span text:style-name="T7">V</text:span><text:tab/>tilavuus<text:tab/><text:tab/>[m<text:span text:style-name="T9">3</text:span>]</text:p>
      <text:p text:style-name="LUT_20_Normal_20_Times_20_New_20_Roman_20_12"><text:span text:style-name="T7">v </text:span><text:tab/>ominaistilavuus<text:tab/>[m<text:span text:style-name="T9">3</text:span>/kg]</text:p>
      <text:p text:style-name="LUT_20_Normal_20_Times_20_New_20_Roman_20_12"><text:span text:style-name="T7">x</text:span><text:tab/>höyrypitoisuus<text:tab/></text:p>
      <text:p text:style-name="LUT_20_Normal_20_Times_20_New_20_Roman_20_12"/>
      <text:p text:style-name="LUT_20_Normal_20_Times_20_New_20_Roman_20_12">Kreikkalaiset</text:p>
      <text:p text:style-name="LUT_20_Normal_20_Times_20_New_20_Roman_20_12"><text:span text:style-name="T10"></text:span><text:tab/>kohtauskulma<text:tab/>[<text:span text:style-name="T11"></text:span>]</text:p>
      <text:p text:style-name="LUT_20_Normal_20_Times_20_New_20_Roman_20_12">λ<text:tab/>lämmönjohtavuus <text:tab/>[W/(mK)]</text:p>
      <text:p text:style-name="LUT_20_Normal_20_Times_20_New_20_Roman_20_12"/>
      <text:p text:style-name="LUT_20_Normal_20_Times_20_New_20_Roman_20_12">Vakiot</text:p>
      <text:p text:style-name="LUT_20_Normal_20_Times_20_New_20_Roman_20_12">g<text:tab/>painovoimakiihtyvyys<text:tab/>9,81 m/s</text:p>
      <text:p text:style-name="LUT_20_Normal_20_Times_20_New_20_Roman_20_12"/>
      <text:p text:style-name="LUT_20_Normal_20_Times_20_New_20_Roman_20_12">Dimensiottomat luvut</text:p>
      <text:p text:style-name="LUT_20_Normal_20_Times_20_New_20_Roman_20_12">Re<text:tab/>Reynoldsin luku</text:p>
      <text:p text:style-name="LUT_20_Normal_20_Times_20_New_20_Roman_20_12"/>
      <text:p text:style-name="LUT_20_Normal_20_Times_20_New_20_Roman_20_12">Alaindeksit</text:p>
      <text:p text:style-name="LUT_20_Normal_20_Times_20_New_20_Roman_20_12">1<text:tab/>sisäänvirtaus</text:p>
      <text:p text:style-name="LUT_20_Normal_20_Times_20_New_20_Roman_20_12"><text:soft-page-break/>2<text:tab/>ulosvirtaus</text:p>
      <text:p text:style-name="LUT_20_Normal_20_Times_20_New_20_Roman_20_12">kr<text:tab/>kriittinen</text:p>
      <text:p text:style-name="LUT_20_Normal_20_Times_20_New_20_Roman_20_12">mit<text:tab/>mitattu</text:p>
      <text:p text:style-name="LUT_20_Normal_20_Times_20_New_20_Roman_20_12"/>
      <text:p text:style-name="LUT_20_Normal_20_Times_20_New_20_Roman_20_12">Yläindeksit</text:p>
      <text:p text:style-name="LUT_20_Normal_20_Times_20_New_20_Roman_20_12"><text:span text:style-name="T7">'</text:span><text:tab/>staattori</text:p>
      <text:p text:style-name="LUT_20_Normal_20_Times_20_New_20_Roman_20_12"><text:span text:style-name="T7">"</text:span><text:tab/>roottori</text:p>
      <text:p text:style-name="LUT_20_Normal_20_Times_20_New_20_Roman_20_12"/>
      <text:p text:style-name="LUT_20_Normal_20_Times_20_New_20_Roman_20_12">Lyhenteet</text:p>
      <text:p text:style-name="LUT_20_Normal_20_Times_20_New_20_Roman_20_12">CFD<text:tab/>numeerinen virtauslaskenta (Computational Fluid Dynamics)</text:p>
      <text:p text:style-name="LUT_20_Normal_20_Times_20_New_20_Roman_20_12">ORC<text:tab/>orgaaninen Rankine kiertoprosessi (Organic Rankine Cycle) </text:p>
      <text:p text:style-name="P14" loext:marker-style-name="T3"><text:span text:style-name="T3">Sisällysluettelo</text:span><text:span text:style-name="T3"/></text:p>
      <text:p text:style-name="LUT_20_Normal_20_Times_20_New_20_Roman_20_12"/>
      <text:p text:style-name="P15">Abstract</text:p>
      <text:p text:style-name="LUT_20_Normal_20_Times_20_New_20_Roman_20_12">Tiivistelmä</text:p>
      <text:p text:style-name="P16">Acknowledgement</text:p>
      <text:p text:style-name="LUT_20_Normal_20_Times_20_New_20_Roman_20_12">(Symboli- ja lyhenneluettel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_Toc1527_1189417642" office:name="Introduction" text:style-name="Index_20_Link" text:visited-style-name="Index_20_Link">1 Introduction<text:tab/>10</text:a></text:p>
          <text:p text:style-name="P17"><text:a xlink:type="simple" xlink:href="#__RefHeading___Toc1529_1189417642" office:name="Related research" text:style-name="Index_20_Link" text:visited-style-name="Index_20_Link">2 Related research<text:tab/>12</text:a></text:p>
          <text:p text:style-name="P18"><text:a xlink:type="simple" xlink:href="#__RefHeading___Toc1531_1189417642" office:name="Machine vision" text:style-name="Index_20_Link" text:visited-style-name="Index_20_Link">2.1 Machine vision<text:tab/>12</text:a></text:p>
          <text:p text:style-name="P18"><text:a xlink:type="simple" xlink:href="#__RefHeading___Toc1537_1189417642" office:name="Machine learning" text:style-name="Index_20_Link" text:visited-style-name="Index_20_Link">2.2 Machine learning<text:tab/>12</text:a></text:p>
          <text:p text:style-name="P18"><text:a xlink:type="simple" xlink:href="#__RefHeading___Toc1446_711410486" office:name="Camera systems" text:style-name="Index_20_Link" text:visited-style-name="Index_20_Link">2.3 Camera systems<text:tab/>12</text:a></text:p>
          <text:p text:style-name="P17"><text:a xlink:type="simple" xlink:href="#__RefHeading___Toc1539_1189417642" office:name="Methodology" text:style-name="Index_20_Link" text:visited-style-name="Index_20_Link">3 Methodology<text:tab/>13</text:a></text:p>
          <text:p text:style-name="P17"><text:a xlink:type="simple" xlink:href="#__RefHeading___Toc1549_1189417642" office:name="Machine vision models" text:style-name="Index_20_Link" text:visited-style-name="Index_20_Link">4 Machine vision models<text:tab/>14</text:a></text:p>
          <text:p text:style-name="P17"><text:a xlink:type="simple" xlink:href="#__RefHeading___Toc2552_1189417642" office:name="Training of the machine vision model" text:style-name="Index_20_Link" text:visited-style-name="Index_20_Link">5 Training of the machine vision model<text:tab/>15</text:a></text:p>
          <text:p text:style-name="P17"><text:a xlink:type="simple" xlink:href="#__RefHeading___Toc2554_1189417642" office:name="Camera systems" text:style-name="Index_20_Link" text:visited-style-name="Index_20_Link">6 Camera systems<text:tab/>16</text:a></text:p>
          <text:p text:style-name="P17"><text:a xlink:type="simple" xlink:href="#__RefHeading___Toc2556_1189417642" office:name="The artifact" text:style-name="Index_20_Link" text:visited-style-name="Index_20_Link">7 The artifact<text:tab/>17</text:a></text:p>
          <text:p text:style-name="P17"><text:a xlink:type="simple" xlink:href="#__RefHeading___Toc2558_1189417642" office:name="Discussion" text:style-name="Index_20_Link" text:visited-style-name="Index_20_Link">8 Discussion<text:tab/>18</text:a></text:p>
          <text:p text:style-name="P17"><text:a xlink:type="simple" xlink:href="#__RefHeading___Toc1551_1189417642" office:name="Conclusions" text:style-name="Index_20_Link" text:visited-style-name="Index_20_Link">9 Conclusions<text:tab/>19</text:a></text:p>
          <text:p text:style-name="P17"><text:a xlink:type="simple" xlink:href="#__RefHeading___Toc1448_711410486" office:name="Future work" text:style-name="Index_20_Link" text:visited-style-name="Index_20_Link">10 Future work<text:tab/>20</text:a></text:p>
          <text:p text:style-name="P17"><text:a xlink:type="simple" xlink:href="#__RefHeading___Toc1553_1189417642" office:name="Lähteet" text:style-name="Index_20_Link" text:visited-style-name="Index_20_Link">Lähteet<text:tab/>21</text:a></text:p>
        </text:index-body>
      </text:table-of-content>
      <text:p text:style-name="Contents_20_1"/>
      <text:p text:style-name="LUT_20_Normal_20_Times_20_New_20_Roman_20_12">Liitteet</text:p>
      <text:p text:style-name="LUT_20_Normal_20_Times_20_New_20_Roman_20_12">Liite 1. Tekstinkäsittely- ja asettelu opinnäytetyössä</text:p>
      <text:p text:style-name="LUT_20_Normal_20_Times_20_New_20_Roman_20_12">Liite 2. Lähdeviittaukset</text:p>
      <text:p text:style-name="LUT_20_Normal_20_Times_20_New_20_Roman_20_12">Liite 3. Taulukot, kuvat, yhtälöt, numerot, symbolit ja lyhenteet </text:p>
      <text:p text:style-name="LUT_20_Normal_20_Times_20_New_20_Roman_20_12">Liite 4. Opinnäytetyön liitteet</text:p>
      <text:p text:style-name="LUT_20_Normal_20_Times_20_New_20_Roman_20_12">Liite 5. Opinnäytetyön julkaiseminen</text:p>
      <text:p text:style-name="P2">Kuvaluettelo</text:p>
      <text:p text:style-name="LUT_20_Normal_20_Times_20_New_20_Roman_20_12">Kuva 1: Kuvan nimi</text:p>
      <text:p text:style-name="LUT_20_Normal_20_Times_20_New_20_Roman_20_12">Kuva 2: Kuvan nimi</text:p>
      <text:p text:style-name="LUT_20_Normal_20_Times_20_New_20_Roman_20_12"/>
      <text:p text:style-name="LUT_20_Normal_20_Times_20_New_20_Roman_20_12">Taulukkoluettelo</text:p>
      <text:p text:style-name="LUT_20_Normal_20_Times_20_New_20_Roman_20_12">Taulukko 1: Taulukon nimi </text:p>
      <text:p text:style-name="LUT_20_Normal_20_Times_20_New_20_Roman_20_12">HUOM! Kuva- ja taulukkoluettelot eivät ole pakollisia</text:p>
      <text:p text:style-name="LUT_20_Normal_20_Times_20_New_20_Roman_20_12"/>
      <text:list text:style-name="WWNum10">
        <text:list-item>
          <text:h text:style-name="P19" text:outline-level="1"><text:bookmark-start text:name="__RefHeading___Toc1527_1189417642"/><text:bookmark-start text:name="_Toc90385284"/>I<text:bookmark-end text:name="_Toc90385284"/>ntroduction<text:bookmark-end text:name="__RefHeading___Toc1527_1189417642"/></text:h>
        </text:list-item>
      </text:list>
      <text:p text:style-name="P20"><text:span text:style-name="T12">This is a research done for Bitwell </text:span><text:reference-mark-start text:name="ZOTERO_ITEM CSL_CITATION {&quot;citationID&quot;:&quot;KqusLdb3&quot;,&quot;properties&quot;:{&quot;unsorted&quot;:false,&quot;formattedCitation&quot;:&quot;({\\i{}Bitwell Oy}, no date)&quot;,&quot;plainCitation&quot;:&quot;(Bitwell Oy, no date)&quot;,&quot;noteIndex&quot;:0},&quot;citationItems&quot;:[{&quot;id&quot;:54,&quot;uris&quot;:[&quot;http://zotero.org/users/local/KOoXlric/items/D77IMUPE&quot;],&quot;itemData&quot;:{&quot;id&quot;:54,&quot;type&quot;:&quot;webpage&quot;,&quot;language&quot;:&quot;fi&quot;,&quot;title&quot;:&quot;Bitwell Oy&quot;,&quot;URL&quot;:&quot;https://www.bitwell.fi&quot;,&quot;accessed&quot;:{&quot;date-parts&quot;:[[&quot;2026&quot;,6,23]]}}}],&quot;schema&quot;:&quot;https://github.com/citation-style-language/schema/raw/master/csl-citation.json&quot;} RND8GYwNzFmVM"/><text:span text:style-name="T13">(</text:span><text:span text:style-name="T14">Bitwell Oy</text:span><text:span text:style-name="T13">, no date)</text:span><text:reference-mark-end text:name="ZOTERO_ITEM CSL_CITATION {&quot;citationID&quot;:&quot;KqusLdb3&quot;,&quot;properties&quot;:{&quot;unsorted&quot;:false,&quot;formattedCitation&quot;:&quot;({\\i{}Bitwell Oy}, no date)&quot;,&quot;plainCitation&quot;:&quot;(Bitwell Oy, no date)&quot;,&quot;noteIndex&quot;:0},&quot;citationItems&quot;:[{&quot;id&quot;:54,&quot;uris&quot;:[&quot;http://zotero.org/users/local/KOoXlric/items/D77IMUPE&quot;],&quot;itemData&quot;:{&quot;id&quot;:54,&quot;type&quot;:&quot;webpage&quot;,&quot;language&quot;:&quot;fi&quot;,&quot;title&quot;:&quot;Bitwell Oy&quot;,&quot;URL&quot;:&quot;https://www.bitwell.fi&quot;,&quot;accessed&quot;:{&quot;date-parts&quot;:[[&quot;2026&quot;,6,23]]}}}],&quot;schema&quot;:&quot;https://github.com/citation-style-language/schema/raw/master/csl-citation.json&quot;} RND8GYwNzFmVM"/><text:span text:style-name="T15">. </text:span><text:span text:style-name="T12">This research is go over what machine vision models are available, how to train them, what camera systems can be used, compare options and optimize cost, and produce an artifact which is a working machine vision system for Bitwell. </text:span><text:span text:style-name="T16">Thus t</text:span><text:span text:style-name="T17">his research paper will answer to questions:<text:line-break/></text:span><text:span text:style-name="T16">1. How to implement a taught machine vision model in real time image manipulation and analyzes?</text:span></text:p>
      <text:p text:style-name="P21"><text:span text:style-name="T18">2. Which available machine vision model is most optimal in terms of cost while usable in general situations?</text:span></text:p>
      <text:p text:style-name="P21">3. <text:span text:style-name="T18">What tools and requirements are there to taught a machine vision model?</text:span></text:p>
      <text:p text:style-name="P22">4. What services and equipment are available to taught a machine vision model and how to choose least costing one while requirements are met?</text:p>
      <text:p text:style-name="P23"><text:span text:style-name="T18">5</text:span>. <text:span text:style-name="T19">What interfaces are there and how to utilize them in user applications? </text:span></text:p>
      <text:p text:style-name="P24">6. What software development tools are there?</text:p>
      <text:p text:style-name="P21"><text:span text:style-name="T19">7</text:span>. <text:span text:style-name="T19">Can machine vision model be run on a embedded system? What options and limitations are there?</text:span></text:p>
      <text:p text:style-name="P13">The importance of this research comes from implementation of improved machine vision and guide how to choose what tools to use to implement this improved machine vision.</text:p>
      <text:p text:style-name="P24">(TODO: most significant results and why they are significant)</text:p>
      <text:p text:style-name="P12">The structure of this document will be following. The first chapter is the ”Introduction” where issues and research questions are presented. The second chapter is the ”Related research” where foundation and comparison points for this research are presented. The third chapter is the ”Methodology” where the used research methodologies are explained in detail and how this research utilizes them. The fourth chapter is the ”Machine vision models” chapter that explains how machine visions work, compares different models, and explains why this research chose a model to use. The fifth chapter is the ”Training of the machine vision model” which explains the training process used to train machine visions and how <text:soft-page-break/>this research did it. <text:span text:style-name="T19">The sixth chapter is the “camera systems” which compares different camera systems and tells how to choose correct one. The seventh chapter is the “the artifact” where the implementation is documented in the detail and how decisions affected the outcome. The eighth chapter is the “Discussion” where </text:span><text:span text:style-name="T20">results are analyzed and compared to “Related research” chapter</text:span><text:span text:style-name="T19">. </text:span><text:span text:style-name="T20">The ninth chapter is “Conclusions” where main questions and results are summarized. The tenth chapter is “Future work” where questions to next research are presented.</text:span></text:p>
      <text:p text:style-name="P25"/>
      <text:p text:style-name="LUT_20_Normal_20_Times_20_New_20_Roman_20_12"/>
      <text:p text:style-name="LUT_20_Normal_20_Times_20_New_20_Roman_20_12">Johdannossa kerrotaan, miksi ja miten tutkimus on tehty ja mitä sillä aiotaan saavuttaa. Siinä myös annetaan esimakua keskeisimmistä tuloksista. Johdannon ensimmäinen kappale sisältää vastaukset seuraaviin kysymyksiin: Mitä aihetta työsi käsittelee? Miksi tätä aihetta on tärkeä tutkia juuri nyt? Miksi aihe ylipäätään on tärkeä? Se houkuttelee lukijan lukemaan työsi.</text:p>
      <text:p text:style-name="LUT_20_Normal_20_Times_20_New_20_Roman_20_12">Johdannon toinen kappale esittelee aiemman tutkimuksen keskeiset työt ja tulokset tiiviisti, ja kolmas osa kertoo, mitä aiempi tutkimus ei ole ottanut huomioon tai mikä on jäänyt tutkimatta. Se siis kertoo perustelut juuri tämän tutkielman tekemiselle. Johdannon lopuksi kerrotaan tutkimuksen tavoitteet, tutkimusongelma, tutkimuskysymykset, tehdyt rajaukset ja lyhyesti tutkielman rakenne. </text:p>
      <text:list text:continue-numbering="true" text:style-name="WWNum10">
        <text:list-item>
          <text:h text:style-name="P19" text:outline-level="1"><text:bookmark-start text:name="__RefHeading___Toc1529_1189417642"/><text:bookmark-start text:name="_Toc90385285"/>R<text:bookmark-end text:name="_Toc90385285"/>elated <text:span text:style-name="T21">r</text:span>esearch<text:bookmark-end text:name="__RefHeading___Toc1529_1189417642"/></text:h>
        </text:list-item>
      </text:list>
      <text:p text:style-name="P26">This chapter will present similar studies and research as a foundation to this research. This <text:span text:style-name="T22">is as comparison to</text:span> show what new knowledge this research will bring.</text:p>
      <text:list text:continue-numbering="true" text:style-name="WWNum10">
        <text:list-item>
          <text:list>
            <text:list-item>
              <text:h text:style-name="P27" text:outline-level="2"><text:bookmark-start text:name="__RefHeading___Toc1531_1189417642"/>Machine vision<text:bookmark-end text:name="__RefHeading___Toc1531_1189417642"/></text:h>
            </text:list-item>
          </text:list>
        </text:list-item>
      </text:list>
      <text:p text:style-name="P28">This sub-chapter will present<text:span text:style-name="T23"> </text:span>how other have implemented their machine vision model and how that compares to this research.</text:p>
      <text:p text:style-name="P29"><text:span text:style-name="T24">Halinen’s master’s thesis research focuses on theory on what requirements does a machine vision system need and what options are available for those needs. One application was to replacing people in repetitive quality assurance tasks in packaging</text:span><text:span text:style-name="T12">. </text:span><text:reference-mark-start text:name="ZOTERO_ITEM CSL_CITATION {&quot;citationID&quot;:&quot;XP34wC3S&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eIPnuVRKd4"/><text:span text:style-name="T12">(Halinen, 2017)</text:span><text:reference-mark-end text:name="ZOTERO_ITEM CSL_CITATION {&quot;citationID&quot;:&quot;XP34wC3S&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eIPnuVRKd4"/><text:span text:style-name="T12">.</text:span></text:p>
      <text:p text:style-name="P28">(TODO: comparison)</text:p>
      <text:list text:continue-numbering="true" text:style-name="WWNum10">
        <text:list-item>
          <text:list>
            <text:list-item>
              <text:h text:style-name="P27" text:outline-level="2"><text:bookmark-start text:name="__RefHeading___Toc1537_1189417642"/>Machine learning<text:bookmark-end text:name="__RefHeading___Toc1537_1189417642"/></text:h>
            </text:list-item>
          </text:list>
        </text:list-item>
      </text:list>
      <text:p text:style-name="P28">This sub-chapter will present how other have taught their machine vision model and how that compares to this research.</text:p>
      <text:p text:style-name="P28"/>
      <text:p text:style-name="P28">(TODO: comparison)</text:p>
      <text:list text:continue-numbering="true" text:style-name="WWNum10">
        <text:list-item>
          <text:list>
            <text:list-item>
              <text:h text:style-name="P30" text:outline-level="2"><text:bookmark-start text:name="__RefHeading___Toc1446_711410486"/>Camera systems<text:bookmark-end text:name="__RefHeading___Toc1446_711410486"/></text:h>
            </text:list-item>
          </text:list>
        </text:list-item>
      </text:list>
      <text:p text:style-name="P28">This sub-chapter will present how other have chosen and implemented their camera systems and how that compares to this research.’</text:p>
      <text:p text:style-name="P28"/>
      <text:p text:style-name="P28">(TODO: comparison)</text:p>
      <text:list text:continue-numbering="true" text:style-name="WWNum10">
        <text:list-item>
          <text:h text:style-name="P19" text:outline-level="1"><text:bookmark-start text:name="__RefHeading___Toc1539_1189417642"/><text:bookmark-start text:name="_Toc90385290"/>M<text:bookmark-end text:name="_Toc90385290"/>ethodology<text:bookmark-end text:name="__RefHeading___Toc1539_1189417642"/></text:h>
        </text:list-item>
      </text:list>
      <text:p text:style-name="P25"/>
      <text:list text:continue-numbering="true" text:style-name="WWNum10">
        <text:list-item>
          <text:h text:style-name="P31" text:outline-level="1"><text:bookmark-start text:name="__RefHeading___Toc1549_1189417642"/>Machine <text:span text:style-name="T21">v</text:span>ision <text:span text:style-name="T21">m</text:span>odels<text:bookmark-end text:name="__RefHeading___Toc1549_1189417642"/></text:h>
        </text:list-item>
      </text:list>
      <text:p text:style-name="P32">In this chapter, this research explains basics of machine vision, what models are available, how they compare to each other, what model this research ends up using, and reasoning why that model was selected.</text:p>
      <text:list text:continue-numbering="true" text:style-name="WWNum10">
        <text:list-item>
          <text:list>
            <text:list-item>
              <text:h text:style-name="P33" text:outline-level="2">How machine vision works</text:h>
            </text:list-item>
          </text:list>
        </text:list-item>
      </text:list>
      <text:p text:style-name="LUT_20_Normal_20_Times_20_New_20_Roman_20_12"><text:span text:style-name="T25">According to Halinen’s master thesis, machine vision system consist of four parts: forming of image, capturing of image, image processing, and control system. </text:span><text:reference-mark-start text:name="ZOTERO_ITEM CSL_CITATION {&quot;citationID&quot;:&quot;x9s2baEY&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tlGOdphwWY"/><text:span text:style-name="T26">(Halinen, 2017)</text:span><text:reference-mark-end text:name="ZOTERO_ITEM CSL_CITATION {&quot;citationID&quot;:&quot;x9s2baEY&quot;,&quot;properties&quot;:{&quot;unsorted&quot;:false,&quot;formattedCitation&quot;:&quot;(Halinen, 2017)&quot;,&quot;plainCitation&quot;:&quot;(Halinen, 2017)&quot;,&quot;noteIndex&quot;:0},&quot;citationItems&quot;:[{&quot;id&quot;:53,&quot;uris&quot;:[&quot;http://zotero.org/users/local/KOoXlric/items/YZH7CH8C&quot;],&quot;itemData&quot;:{&quot;id&quot;:53,&quot;type&quot;:&quot;article-journal&quot;,&quot;language&quot;:&quot;fi&quot;,&quot;source&quot;:&quot;Zotero&quot;,&quot;title&quot;:&quot;KONENÄKÖJÄRJESTELMÄN MÄÄRITTELY YKSIKKÖPAKATTUJEN TUOTTEIDEN TARKISTAMISEEN&quot;,&quot;author&quot;:[{&quot;family&quot;:&quot;Halinen&quot;,&quot;given&quot;:&quot;Joonas&quot;}],&quot;issued&quot;:{&quot;date-parts&quot;:[[&quot;2017&quot;]]}}}],&quot;schema&quot;:&quot;https://github.com/citation-style-language/schema/raw/master/csl-citation.json&quot;} RNDtlGOdphwWY"/><text:span text:style-name="T26"> .</text:span></text:p>
      <text:list text:continue-numbering="true" text:style-name="WWNum10">
        <text:list-item>
          <text:h text:style-name="P34" text:outline-level="1"><text:bookmark-start text:name="__RefHeading___Toc2552_1189417642"/>Training of <text:span text:style-name="T27">the </text:span>machine vision model<text:bookmark-end text:name="__RefHeading___Toc2552_1189417642"/></text:h>
        </text:list-item>
      </text:list>
      <text:p text:style-name="P35">This chapter will go over how machine vision model can be trained and how this research will train it. Training related data will be displayed which includes method used, the cost of training, and details of training data such as format and amount.</text:p>
      <text:list text:continue-numbering="true" text:style-name="WWNum10">
        <text:list-item>
          <text:h text:style-name="P34" text:outline-level="1"><text:bookmark-start text:name="__RefHeading___Toc2554_1189417642"/>Camera systems<text:bookmark-end text:name="__RefHeading___Toc2554_1189417642"/></text:h>
        </text:list-item>
      </text:list>
      <text:p text:style-name="P35">This chapter goes over how different camera systems compare and how this research chose what it uses in implementation.</text:p>
      <text:list text:continue-numbering="true" text:style-name="WWNum10">
        <text:list-item>
          <text:h text:style-name="P34" text:outline-level="1"><text:bookmark-start text:name="__RefHeading___Toc2556_1189417642"/>The artifact<text:bookmark-end text:name="__RefHeading___Toc2556_1189417642"/></text:h>
        </text:list-item>
      </text:list>
      <text:p text:style-name="P35">This chapter tells how the whole system was put together, <text:span text:style-name="T28">how different parts communicate through interfaces, and how the trained machine vision model was run</text:span>. </text:p>
      <text:p text:style-name="P35"/>
      <text:list text:continue-numbering="true" text:style-name="WWNum10">
        <text:list-item>
          <text:h text:style-name="P36" text:outline-level="1"><text:bookmark-start text:name="__RefHeading___Toc2558_1189417642"/>Discussion<text:bookmark-end text:name="__RefHeading___Toc2558_1189417642"/></text:h>
        </text:list-item>
      </text:list>
      <text:p text:style-name="P37">This chapter is a reflect how the research went, <text:span text:style-name="T20">how well this answered the research questions, how this research compares to related research,</text:span> and more insight to how to improve the system.</text:p>
      <text:list text:continue-numbering="true" text:style-name="WWNum10">
        <text:list-item>
          <text:h text:style-name="P38" text:outline-level="1"><text:bookmark-start text:name="__RefHeading___Toc1551_1189417642"/><text:bookmark-start text:name="_Toc90385295"/>C<text:bookmark-end text:name="_Toc90385295"/>onclusions<text:bookmark-end text:name="__RefHeading___Toc1551_1189417642"/></text:h>
        </text:list-item>
      </text:list>
      <text:p text:style-name="LUT_20_Normal_20_Times_20_New_20_Roman_20_12">Johtopäätöksissä kerrotaan, miten hyvin tehty tutkimus vastasi sille asetettuihin tavoitteisiin, mitä kiinnostavaa uutta siinä löydettiin ja mitä saavutetut tulokset merkitsevät laajemmassa perspektiivissä ja mahdollisesti tulevaisuudessa. Johtopäätöksissä tarkastellaan, miten tutkimustulokset erosivat/olivat samanlaisia suhteessa aiempaan tutkimukseen. Tutkimuksen vaikuttavuutta eli esimerkiksi sen teoreettista, tutkimuksellista tai käytännöllistä kontribuutiota ja laajempaa yhteiskunnallista merkitystä on hyvä pohtia johtopäätöksissä. Lisäksi tutkimuksen rajoitteet ja mahdolliset jatkotutkimusaiheet tuodaan esiin johtopäätökset-luvussa.</text:p>
      <text:p text:style-name="LUT_20_Normal_20_Times_20_New_20_Roman_20_12">Muista, että jos joku muu kuin ohjaaja joskus lukee opinnäytteesi, hän todennäköisesti lukee ensimmäiseksi johdannon ja johtopäätökset.</text:p>
      <text:list text:continue-numbering="true" text:style-name="WWNum10">
        <text:list-item>
          <text:h text:style-name="P39" text:outline-level="1"><text:bookmark-start text:name="__RefHeading___Toc1448_711410486"/>Future work<text:bookmark-end text:name="__RefHeading___Toc1448_711410486"/></text:h>
        </text:list-item>
      </text:list>
      <text:p text:style-name="P13">This chapter displays what could be possible research questions to the next research and why there are significant.</text:p>
      <text:h text:style-name="P40" text:outline-level="1"><text:bookmark-start text:name="__RefHeading___Toc1553_1189417642"/><text:bookmark-start text:name="_Toc90385296"/>Lähteet<text:bookmark-end text:name="__RefHeading___Toc1553_1189417642"/><text:bookmark-end text:name="_Toc90385296"/></text:h>
      <text:section text:style-name="Sect1" text:name="ZOTERO_BIBL {&quot;uncited&quot;:[],&quot;omitted&quot;:[],&quot;custom&quot;:[]} CSL_BIBLIOGRAPHY RNDrgtkSAC8BU">
        <text:p text:style-name="Bibliography_20_1"><text:span text:style-name="T29">Bitwell Oy</text:span> (no date). Available at: https://www.bitwell.fi (Accessed: 23 June 2026).</text:p>
        <text:p text:style-name="Bibliography_20_1">Halinen, J. (2017) ‘KONENÄKÖJÄRJESTELMÄN MÄÄRITTELY YKSIKKÖPAKATTUJEN TUOTTEIDEN TARKISTAMISEEN’.</text:p>
      </text:section>
      <text:p text:style-name="LUT_20_Normal_20_Times_20_New_20_Roman_20_12"/>
      <text:p text:style-name="LUT_20_Normal_20_Times_20_New_20_Roman_20_12">Hirsjärvi, S., Remes, P. &amp; Sajavaara, P. 2009. Tutki ja kirjoita. 15. p. Helsinki, Tammi.</text:p>
      <text:p text:style-name="LUT_20_Normal_20_Times_20_New_20_Roman_20_12" loext:marker-style-name="T4"><text:span text:style-name="T4">Stratton, C. R. 1976. Needs assessment for communication system design. Journal of Technical Writing and Communication. Vol. 6, nro. 2, s. 135–144.</text:span><text:span text:style-name="T4"/></text:p>
      <text:p text:style-name="LUT_20_Normal_20_Times_20_New_20_Roman_20_12"><text:span text:style-name="T4">Virtanen, V. 2011. </text:span>Esimerkkilähteen otsikko. Lappeenrannan–Lahden teknillinen yliopisto LUT. Luettu 1.1.2018. Saatavissa <text:a xlink:type="simple" xlink:href="http://esimerkki.fi/" text:style-name="Internet_20_link" text:visited-style-name="Visited_20_Internet_20_Link"><text:span text:style-name="Internet_20_link">LUT Tiedekirjastosta</text:span></text:a></text:p>
      <text:p text:style-name="LUT_20_Normal_20_Times_20_New_20_Roman_20_12"/>
      <text:p text:style-name="P41">HUOM. Lisäohjeita lähteiden käyttöön ja merkintään on liitteessä 2.</text:p>
      <text:p text:style-name="P42">Liite 1. Tekstinkäsittely ja -asettelu opinnäytetyössä </text:p>
      <text:p text:style-name="LUT_20_Normal_20_Times_20_New_20_Roman_20_12">Hyvät tekstinkäsittelyohjelman käyttötaidot tekevät opinnäytetyön kirjoittamisesta ja opinnäytetyöpohjan käyttämisestä sujuvaa. Tämän vuoksi onkin hyvä ennen kirjoitusprosessin alkua varmistaa osaavansa riittävät perustaidot pitkien asiakirjojen muokkaamisesta tekstinkäsittelyohjelmalla. Näihin taitoihin kuuluvat erityisesti Tyyli-työkalun käyttö sekä ymmärrys asiakirjan osioinneista ja automaattisten viittausten käytöstä. </text:p>
      <text:p text:style-name="LUT_20_Normal_20_Times_20_New_20_Roman_20_12">Aivan välttämättömin lähtökohta tämän opinnäytepohjan käyttöön, on sisäistää seuraavat perusasiat Wordin käytöstä:</text:p>
      <text:list text:style-name="WWNum11">
        <text:list-item>
          <text:p text:style-name="P43">Mitään tekstiä ei asemoida käyttämällä useita peräkkäisiä välilyöntejä tai rivinvaihtoja. Jos joudut painamaan Enter- tai välilyöntinäppäintä peräkkäin useammin kuin kerran, teet todennäköisesti jotain väärin. Kappalevaihdossa painetaan Enteriä rivin lopussa kerran ja kappaleiden väleihin tuleva tyhjä tila toteutetaan Tyyli-työkalun avulla.</text:p>
        </text:list-item>
        <text:list-item>
          <text:p text:style-name="P43">Mitään numeroitua tietoa (kappalenumerot, sivunumerointi, kuvien/taulukoiden/kaavioiden/liitteiden numerointi) ei ole järkevää tehdä kirjoittamalla numeroita manuaalisesti. Näihin kaikkiin löytyy Wordista tehokkaat automaattiset työkalut, jotka pitävät numeroinnin järjestyksessä, vaikka tietoa muokattaisiin, lisättäisiin tai poistettaisiin. Tässä mallipohjassa on käytetty automaattista kappaleiden ja sivujen numerointia.</text:p>
        </text:list-item>
        <text:list-item>
          <text:p text:style-name="P43">Tavuviivoja ei koskaan lisätä rivin lopussa oleviin sanoihin kirjoittamalla ne manuaalisesti. Opinnäytetyöpohjassa on asetettu käyttöön Wordin automaattinen tavutustoiminto. Jos tavuviivoja on tarpeen lisätä itse, se tapahtuu Wordin tavutus-vihje-työkalun avulla. Englanninkielisessä opinnäytetyössä tavutustoiminto on tyypillisesti asetettu pois käytöstä.</text:p>
        </text:list-item>
      </text:list>
      <text:p text:style-name="LUT_20_Normal_20_Times_20_New_20_Roman_20_12"/>
      <text:p text:style-name="LUT_20_Normal_20_Times_20_New_20_Roman_20_12" loext:marker-style-name="T30"><text:span text:style-name="T30">Rivivälit, kirjasintyyppi, marginaalit, tasaukset, sivunumerointi ja otsikot </text:span><text:span text:style-name="T30"/></text:p>
      <text:p text:style-name="LUT_20_Normal_20_Times_20_New_20_Roman_20_12">Virallisten asetteluohjeiden mukaan rivivälin tulisi olla 1,5, paitsi tiivistelmässä ja mahdollisissa suorissa lainauksissa, joissa riviväli on 1. Kirjasintyypille on kaksi eri mahdollisuutta: Times New Roman (12 pt) tai Arial (11 pt). Tämä ohje on kirjoitettu käyttämällä Times <text:soft-page-break/>New Roman 12 pt eli tyyliä LUT Normal. Ennen ja jälkeen taulukoiden ja kuvien on suositeltavaa lisätä yksi tyhjä rivi.</text:p>
      <text:p text:style-name="LUT_20_Normal_20_Times_20_New_20_Roman_20_12">Marginaalit ovat</text:p>
      <text:p text:style-name="LUT_20_Normal_20_Times_20_New_20_Roman_20_12">•<text:tab/>Ylös ja vasen 35 mm</text:p>
      <text:p text:style-name="LUT_20_Normal_20_Times_20_New_20_Roman_20_12">•<text:tab/>Alas ja oikealle 20 mm. </text:p>
      <text:p text:style-name="LUT_20_Normal_20_Times_20_New_20_Roman_20_12">Kansilehti on sivunumero 1, mutta sivunumerot eivät näy ennen sisällysluettelon ensimmäistä sivua. Sivunumeroiden tulee olla sivun yläosassa: joko keskellä tai oikealla. Sivunumerot päättyvät lähdeviiteluettelon viimeiselle sivulle: liitteet eivät sisällä sivunumeroita, monisivusta liitettä lukuun ottamatta. </text:p>
      <text:p text:style-name="LUT_20_Normal_20_Times_20_New_20_Roman_20_12">Käytä aina otsikoissa otsikkotyyliä (LUT Heading 1, LUT Heading 2, LUT Heading 3). Pääotsikot (LUT Heading 1) alkavat aina omilta sivuiltaan. Jos laitat tutkielmaan suuria kuvia tai taulukoita, muista tarkistaa, että sivun lopussa (kuvion/taulukon jälkeen) ei ole enempää kuin 20 % tyhjää tilaa. </text:p>
      <text:p text:style-name="LUT_20_Normal_20_Times_20_New_20_Roman_20_12">Otsikon numerointi alkaa johdantoluvusta ja sitä jatketaan peräkkäisin numeroinnein. Huomaa, että otsikon numeron jälkeen ei ole pistettä. Tekstin jälkeen olevassa lähdeluettelossa ei ole otsikkonumerointia. </text:p>
      <text:p text:style-name="LUT_20_Normal_20_Times_20_New_20_Roman_20_12">Otsikoinnin tulisi sisältää korkeintaan kolme tasoa ja otsikot etenevät loogisesti järjestyksessä (ensin LUT Heading 1, sen jälkeen LUT Heading 2 jne.). Jos tarvitaan yksityiskohtaisempia alaotsikoita, niitä ei pitäisi numeroida ja ne tulee jättää myös pois sisällysluettelosta. Ytimekkäät ja lyhyet otsikot, jotka kuvaavat tekstin sisältöä riittävän tarkasti, ovat parhaita. Otsikoissa voi käyttää kysymysmerkkejä tai huutomerkkiä, mutta jos otsikko on lause, pistettä ei tule loppuun. </text:p>
      <text:p text:style-name="LUT_20_Normal_20_Times_20_New_20_Roman_20_12">Huomaa, että tekstissä ei voi olla kahta otsikkoa, jotka seuraavat toisiaan. Esimerkiksi otsikoiden 1 ja 1.1 välissä on oltava tekstiä. </text:p>
      <text:p text:style-name="LUT_20_Normal_20_Times_20_New_20_Roman_20_12"/>
      <text:p text:style-name="P41">Lista on hyvä tapa selkeyttää tekstin sisältöä. Käytä samaa symbolia listalla johdonmukaisesti koko työssäsi. Huomaa myös, että kappale ei saisi koskaan päättyä listalle: listan jälkeen pitäisi olla vähintään kaksi tai kolme lausetta. </text:p>
      <text:p text:style-name="P44">Liite 2. Lähdeviittaukset </text:p>
      <text:p text:style-name="LUT_20_Normal_20_Times_20_New_20_Roman_20_12">Tekstistä tulee löytyä viittaukset käytettyihin lähteisiin. LUT-yliopistossa lähteisiin viitataan käyttäen nimi - vuosi -järjestelmää eli Harvardin järjestelmää, jossa lähdeviitteet muodostuvat tekstin sisään laitettavista tekstiviitteistä ja työn loppuun sijoitettavasta yksityiskohtaisemmasta lähdeluettelosta.</text:p>
      <text:p text:style-name="LUT_20_Normal_20_Times_20_New_20_Roman_20_12">Lähdeviitteiden tarkoituksena on antaa työssä käytetyistä lähteistä riittävästi tietoa, jotta työn lukija voi halutessaan etsiä käytetyt lähteet lisätietoja varten. Tekstiviitteiden avulla työn lukijan pitäisi pystyä löytämään lähteen tarkemmat tiedot lähdeluettelosta helposti. Lähteiden olisi hyvä olla alkuperäisiä ja mahdollisimman tuoreita. Jos työn aiheesta ei ole tehty uutta tutkimusta, on perusteltua käyttää myös vanhoja lähteitä.</text:p>
      <text:p text:style-name="LUT_20_Normal_20_Times_20_New_20_Roman_20_12">Lähteisiin viittaamisella tarkoitetaan, että lähdeaineiston asiasisältö selostetaan omassa työssä omin sanoin. Jos lähteestä otetaan suoria lainauksia (= sitaatti), lainattu teksti sijoitetaan lainausmerkkien väliin. Plagiointi eli toisen henkilön tuotannon käyttö ilman alkuperäisen lähteen asianmukaista ilmoittamista on kielletty.</text:p>
      <text:p text:style-name="LUT_20_Normal_20_Times_20_New_20_Roman_20_12"/>
      <text:p text:style-name="LUT_20_Normal_20_Times_20_New_20_Roman_20_12" loext:marker-style-name="T30"><text:span text:style-name="T30">Tekstiviitteet</text:span><text:span text:style-name="T30"/></text:p>
      <text:p text:style-name="LUT_20_Normal_20_Times_20_New_20_Roman_20_12">Harvardin järjestelmässä tekstiviite sijoitetaan kaarisulkeissa suoraan tekstiin ilmaisemaan sitä tekstin kohtaa, jota viittaus koskee. Viite merkitään virkkeen päättävän pisteen sisään silloin, kun viitataan vain edeltävään virkkeeseen (Kaasinen et al. 2020, 173–174). Suomenkielisessä tutkimusraportoinnissa yli virkkeen ulottuvaan tekstiin viitatessa tulee viite koko kappaleen perään ikään kuin omana erillisenä virkkeenään. Tällöin sulkeiden sisään viitteen loppuun merkitään piste. (Kaasinen et al. 2020, 174.)</text:p>
      <text:p text:style-name="LUT_20_Normal_20_Times_20_New_20_Roman_20_12">Tyypillisessä tapauksessa tekstiviitteessä mainitaan tekijän nimi (sukunimi riittää, paitsi jos usealla käytetyllä lähteellä on sama sukunimi), julkaisuvuosi sekä sivu, jolta tieto on otettu. Tekstiviitteissä ei kuitenkaan ole sivunumeroita, ellei viitata suoraan tiettyyn kohtaan tekstiä tai kyseessä ole suora lainaus. Huomaathan, että tekijän ei tarvitse aina olla yksityishenkilö, vaan se voi olla myös esimerkiksi organisaatio. Mikäli julkaisun tekijä ei käy ilmi lähdeteoksesta, viitataan tekijän nimen sijasta julkaisun nimeen. (Nykänen 2002, 77.) Hyvin <text:soft-page-break/>tavallinen tapa tehdä tekstiviite on mainita tekijä (tai teoksen nimi, jos tekijää ei tunneta) osana tekstiä, esimerkiksi ”Möttösen (2007, 68) tutkimuksen mukaan hauki on kala”.</text:p>
      <text:p text:style-name="LUT_20_Normal_20_Times_20_New_20_Roman_20_12">Jos teoksella on useampi tekijä, merkitään tekstiviitteeseen kaikkien tekijöiden sukunimet, ja nimet erotetaan ja- sanalla tai &amp; -merkillä. Myöhemmin samaan teokseen viitattaessa riittää ensimmäisen nimi sekä ilmaus ’et al.’, ’ja muut’ tai ’ym.’ Jos viitataan saman henkilön useaan samana vuonna julkaistuun teokseen, lisätään vuosiluvun perään pienaakkoset (a, b, c…), jotta lähteet voidaan erottaa toisistaan. Samaa pienaakkosta käytetään myös lähdeluettelossa.</text:p>
      <text:p text:style-name="LUT_20_Normal_20_Times_20_New_20_Roman_20_12">Lähdemerkintä- ja viittaustyylejä on useita. Olennaista on käyttää johdonmukaisesti samaa tyyliä läpi koko opinnäytetyön. Esimerkkejä ja lisäohjeita lähteiden merkitsemiseen ja lähteisiin viittaamiseen:</text:p>
      <text:p text:style-name="LUT_20_Normal_20_Times_20_New_20_Roman_20_12"><text:a xlink:type="simple" xlink:href="https://libguides.lut.fi/viittaaminensahkoisiindokumentteihin" text:style-name="Internet_20_link" text:visited-style-name="Visited_20_Internet_20_Link"><text:span text:style-name="Internet_20_link">LUT Tiedekirjaston ohje</text:span></text:a> sähköisiin dokumentteihin viittaamisesta</text:p>
      <text:p text:style-name="LUT_20_Normal_20_Times_20_New_20_Roman_20_12"><text:a xlink:type="simple" xlink:href="https://libguides.aalto.fi/c.php?g=410672&amp;p=2796631" text:style-name="Internet_20_link" text:visited-style-name="Visited_20_Internet_20_Link"><text:span text:style-name="Internet_20_link">Aalto yliopiston ohje</text:span></text:a> tieteellisestä viittaamisesta ja lähdeluettelon laatimisesta</text:p>
      <text:p text:style-name="P41"><text:a xlink:type="simple" xlink:href="https://www.librarydevelopment.group.shef.ac.uk/referencing/harvard.html" text:style-name="Internet_20_link" text:visited-style-name="Visited_20_Internet_20_Link"><text:span text:style-name="Internet_20_link">Harvard viittaustekniikka</text:span></text:a>, University of Sheffield </text:p>
      <text:p text:style-name="P45">Liite 3. Taulukot, kuvat, yhtälöt, numerot, symbolit ja lyhenteet </text:p>
      <text:p text:style-name="LUT_20_Normal_20_Times_20_New_20_Roman_20_12">Tekstiä on hyvä havainnollistaa kuvien ja taulukoiden avulla. Kuvat ja taulukot numeroidaan juoksevasti ja otsikoidaan. Taulukon otsikko sijoitetaan taulukon yläpuolelle, kuvan otsikko kuvan alapuolelle. Kuviin ja taulukoihin tulee viitata tekstissä mielellään ennen niiden esiintymistä, ja ne alkavat yleensä tekstin kanssa samasta sarkainkohdasta. </text:p>
      <text:p text:style-name="LUT_20_Normal_20_Times_20_New_20_Roman_20_12">Muistathan lisätä kuviin ja taulukoihin tekstivastineen eli ns. alt-tekstin opinnäytetyösi saavutettavuuden varmistamiseksi. Tekstivastine luetaan lukulaitteessa, ja se näkyy myös silloin, kun kuvaa ei jostain syystä pystytä näyttämään sivulla. MS Word-tekstinkäsittelyohjelma tekee tekstivastineen kuvaan automaattisesti, mutta sinun tulee tarkastaa, että teksti kertoo kohteesta riittävästi ja ymmärrettävästi. Tekstivastinetta voit muokata klikkaamalla kuvaa tai taulukkoa hiiren kakkospainikkeella.</text:p>
      <text:p text:style-name="LUT_20_Normal_20_Times_20_New_20_Roman_20_12"/>
      <text:p text:style-name="LUT_20_Normal_20_Times_20_New_20_Roman_20_12" loext:marker-style-name="T30"><text:span text:style-name="T30">Taulukot</text:span><text:span text:style-name="T30"/></text:p>
      <text:p text:style-name="LUT_20_Normal_20_Times_20_New_20_Roman_20_12">Taulukot numeroidaan ja otsikoidaan, ja niihin tulee viitata myös tekstissä. Otsikko sijoitetaan taulukon yläpuolelle, taulukon sarakkeet nimetään ja ilmoitetaan sarakkeessa olevan suureen yksikkö kuten esimerkiksi taulukossa 1. Tyhjiä sarakkeita tai rivejä tulee välttää, vaikka tässä ohjeessa oleva taulukko onkin jouduttu siirtämään seuraavalle sivulle, koska se ei olisi mahtunut tälle sivulle riittävän suurena. Taulukon suositeltava kirjasinkoko on 10.</text:p>
      <text:p text:style-name="LUT_20_Normal_20_Times_20_New_20_Roman_20_12"/>
      <text:p text:style-name="LUT_20_Normal_20_Times_20_New_20_Roman_20_12">Taulukko 1. Anturin mittaustulokset</text:p>
      <table:table table:name="Table1" table:style-name="Table1">
        <table:table-column table:style-name="Table1.A"/>
        <table:table-column table:style-name="Table1.B"/>
        <table:table-row table:style-name="Table1.1">
          <table:table-cell table:style-name="Table1.A1" office:value-type="string">
            <text:p text:style-name="P46" loext:marker-style-name="T31"><text:span text:style-name="T32">Jännite </text:span><text:span text:style-name="T31">U </text:span><text:span text:style-name="T32">[V]</text:span></text:p>
          </table:table-cell>
          <table:table-cell table:style-name="Table1.A1" office:value-type="string">
            <text:p text:style-name="P46" loext:marker-style-name="T32"><text:span text:style-name="T32">Paine </text:span><text:span text:style-name="T31">p </text:span><text:span text:style-name="T32">[Pa]</text:span></text:p>
          </table:table-cell>
        </table:table-row>
        <table:table-row table:style-name="Table1.1">
          <table:table-cell table:style-name="Table1.A1" office:value-type="string">
            <text:p text:style-name="P46" loext:marker-style-name="T32"><text:span text:style-name="T32">0,984</text:span><text:span text:style-name="T32"/></text:p>
          </table:table-cell>
          <table:table-cell table:style-name="Table1.A1" office:value-type="string">
            <text:p text:style-name="P46" loext:marker-style-name="T32"><text:span text:style-name="T32">0</text:span><text:span text:style-name="T32"/></text:p>
          </table:table-cell>
        </table:table-row>
        <table:table-row table:style-name="Table1.1">
          <table:table-cell table:style-name="Table1.A1" office:value-type="string">
            <text:p text:style-name="P46" loext:marker-style-name="T32"><text:span text:style-name="T32">2,252</text:span><text:span text:style-name="T32"/></text:p>
          </table:table-cell>
          <table:table-cell table:style-name="Table1.A1" office:value-type="string">
            <text:p text:style-name="P46" loext:marker-style-name="T32"><text:span text:style-name="T32">150</text:span><text:span text:style-name="T32"/></text:p>
          </table:table-cell>
        </table:table-row>
        <table:table-row table:style-name="Table1.1">
          <table:table-cell table:style-name="Table1.A1" office:value-type="string">
            <text:p text:style-name="P46" loext:marker-style-name="T32"><text:span text:style-name="T32">2,772</text:span><text:span text:style-name="T32"/></text:p>
          </table:table-cell>
          <table:table-cell table:style-name="Table1.A1" office:value-type="string">
            <text:p text:style-name="P46" loext:marker-style-name="T32"><text:span text:style-name="T32">300</text:span><text:span text:style-name="T32"/></text:p>
          </table:table-cell>
        </table:table-row>
        <table:table-row table:style-name="Table1.1">
          <table:table-cell table:style-name="Table1.A1" office:value-type="string">
            <text:p text:style-name="P46" loext:marker-style-name="T32"><text:span text:style-name="T32">3,181</text:span><text:span text:style-name="T32"/></text:p>
          </table:table-cell>
          <table:table-cell table:style-name="Table1.A1" office:value-type="string">
            <text:p text:style-name="P46" loext:marker-style-name="T32"><text:span text:style-name="T32">450</text:span><text:span text:style-name="T32"/></text:p>
          </table:table-cell>
        </table:table-row>
        <table:table-row table:style-name="Table1.1">
          <table:table-cell table:style-name="Table1.A1" office:value-type="string">
            <text:p text:style-name="P46" loext:marker-style-name="T32"><text:span text:style-name="T32">3,615</text:span><text:span text:style-name="T32"/></text:p>
          </table:table-cell>
          <table:table-cell table:style-name="Table1.A1" office:value-type="string">
            <text:p text:style-name="P46" loext:marker-style-name="T32"><text:span text:style-name="T32">600</text:span><text:span text:style-name="T32"/></text:p>
          </table:table-cell>
        </table:table-row>
        <table:table-row table:style-name="Table1.1">
          <table:table-cell table:style-name="Table1.A1" office:value-type="string">
            <text:p text:style-name="P46" loext:marker-style-name="T32"><text:span text:style-name="T32">3,817</text:span><text:span text:style-name="T32"/></text:p>
          </table:table-cell>
          <table:table-cell table:style-name="Table1.A1" office:value-type="string">
            <text:p text:style-name="P46" loext:marker-style-name="T32"><text:span text:style-name="T32">750</text:span><text:span text:style-name="T32"/></text:p>
          </table:table-cell>
        </table:table-row>
        <table:table-row table:style-name="Table1.1">
          <table:table-cell table:style-name="Table1.A1" office:value-type="string">
            <text:p text:style-name="P46" loext:marker-style-name="T32"><text:span text:style-name="T32">4,088</text:span><text:span text:style-name="T32"/></text:p>
          </table:table-cell>
          <table:table-cell table:style-name="Table1.A1" office:value-type="string">
            <text:p text:style-name="P46" loext:marker-style-name="T32"><text:span text:style-name="T32">900</text:span><text:bookmark text:name="_Hlk90986910"/><text:span text:style-name="T32"/></text:p>
          </table:table-cell>
        </table:table-row>
      </table:table>
      <text:p text:style-name="LUT_20_Normal_20_Times_20_New_20_Roman_20_12"/>
      <text:p text:style-name="LUT_20_Normal_20_Times_20_New_20_Roman_20_12"/>
      <text:p text:style-name="LUT_20_Normal_20_Times_20_New_20_Roman_20_12"/>
      <text:p text:style-name="LUT_20_Normal_20_Times_20_New_20_Roman_20_12" loext:marker-style-name="T30"><text:soft-page-break/><text:span text:style-name="T30">Kuvat, kuvaajat, graafiset elementit</text:span><text:span text:style-name="T30"/></text:p>
      <text:p text:style-name="LUT_20_Normal_20_Times_20_New_20_Roman_20_12">Tekstiä havainnollistamaan on hyvä käyttää erilaisia kuvia, joihin tulee viitata myös tekstissä (kuva 1). Kuvat numeroidaan ja otsikoidaan, ja otsikko sijoitetaan kuvan alapuolelle – ei kuvan sisälle. </text:p>
      <text:p text:style-name="LUT_20_Normal_20_Times_20_New_20_Roman_20_12">Kuvaajat tulee pääsääntöisesti piirtää jollakin ohjelmalla, esimerkiksi Excel tai Matlab. Kuvaajien tulee olla ymmärrettäviä ja selkeitä. Taustavärin tulee olla valkoinen, taustaruudukon (“grid”) käyttö on sallittua, jos se ei haittaa kuvaajan tulkitsemista. Muuttuja arvojen tai mittauspisteiden tulee olla selkeästi näkyvillä. Akselit nimetään yksiköineen. </text:p>
      <text:p text:style-name="LUT_20_Normal_20_Times_20_New_20_Roman_20_12">Kuvat on syytä tuottaa mahdollisimman pitkälti itse. Kuvissa pitää käyttää samoja kirjasintyyppejä kuin tekstissä ja yhtälöissäkin. Jos lainaat kuvia, huolehdi kunnollisesta viittauksesta. Muista että kuvat ovat tekijänoikeuden alaisia teoksia, joiden käyttöön pitää aina olla tekijän lupa. Kuvatekstit pitää kirjoittaa julkaisun kielellä. </text:p>
      <text:p text:style-name="LUT_20_Normal_20_Times_20_New_20_Roman_20_12"/>
      <text:p text:style-name="LUT_20_Normal_20_Times_20_New_20_Roman_20_12"><draw:frame draw:style-name="fr1" draw:name="Picture 1" text:anchor-type="as-char" svg:width="3.1945in" svg:height="2.428in" draw:z-index="1"><draw:image xlink:href="Pictures/100000010000046E0000035E35A7AC62.png" xlink:type="simple" xlink:show="embed" xlink:actuate="onLoad" draw:mime-type="image/png"/><svg:desc>Kaasufermentori, Teknologian tutkimuskeskus VTT. Kuvan lähde LUTin kuvapankki.</svg:desc></draw:frame></text:p>
      <text:p text:style-name="LUT_20_Normal_20_Times_20_New_20_Roman_20_12">Kuva 1. Kaasufermentori (VTT 2020, LUTin kuvapankki)</text:p>
      <text:p text:style-name="LUT_20_Normal_20_Times_20_New_20_Roman_20_12"/>
      <text:p text:style-name="LUT_20_Normal_20_Times_20_New_20_Roman_20_12">Tekstikappaletta ei tulisi päättää kuvaan tai taulukkoon, vaan sen jälkeen tulisi vielä olla tekstiä, jossa esimerkiksi kommentoidaan kuvaa. Suuret kuvat, taulukot, pitkät yhtälöjohdot ym. tekstiä tukeva aineisto laitetaan tarvittaessa opinnäytetyön liitteeksi.</text:p>
      <text:p text:style-name="LUT_20_Normal_20_Times_20_New_20_Roman_20_12"/>
      <text:p text:style-name="LUT_20_Normal_20_Times_20_New_20_Roman_20_12"/>
      <text:p text:style-name="LUT_20_Normal_20_Times_20_New_20_Roman_20_12" loext:marker-style-name="T30"><text:soft-page-break/><text:span text:style-name="T30">Numerot, symbolit ja yhtälöt</text:span><text:span text:style-name="T30"/></text:p>
      <text:p text:style-name="LUT_20_Normal_20_Times_20_New_20_Roman_20_12">Tekstissä esitettävät luvut ovat yleensä likiarvoja. Luvun esitystarkkuus riippuu siitä, kuinka suuri on havaintovirhe. Lopputulokseen otetaan mukaan vain merkitsevät numerot. Välituloksissa on syytä pitää mukana vähintään kaksi numeroa enemmän pyöristysvirheiden välttämiseksi. Pienten ja suurten lukujen esittämiseen käytetään kymmenen potensseja 10ⁿ, mieluiten niin, että n on kolmella jaollinen kokonaisluku.</text:p>
      <text:p text:style-name="LUT_20_Normal_20_Times_20_New_20_Roman_20_12">Yhtälöissä ja muissa matemaattisissa esityksissä on käytettävä standardoituja merkkejä, mikäli niitä on olemassa. Muita merkkejä saa käyttää vain standardoitujen tai vakiintuneiden merkkien puuttuessa.</text:p>
      <text:p text:style-name="LUT_20_Normal_20_Times_20_New_20_Roman_20_12">Yhtälöissä käytetyt merkit tulee selittää silloin, kun ne esiintyvät työssä ensimmäisen kerran. Yhtälöt on kirjoitettava selvästi kukin omalle rivilleen ja esimerkiksi sisennettävä. Yhtälöt numeroidaan juoksevasti tai kappaleittain siten, että yhtälön numero on kaarisulkeissa yhtälön oikealla puolella palstan reunassa. Yhtälöihin ei viitata tekstissä ennen niiden esiintymistä kuin poikkeustapauksessa – esim. jos joudutaan viittamaan kauas eteenpäin. Esimerkki:</text:p>
      <text:p text:style-name="P47"><text:span text:style-name="T7">pv</text:span> = <text:span text:style-name="T7">RT</text:span><text:tab/><text:tab/><text:tab/><text:tab/>(1)</text:p>
      <text:p text:style-name="LUT_20_Normal_20_Times_20_New_20_Roman_20_12">jossa <text:span text:style-name="T7">p</text:span> on paine [Pa], <text:span text:style-name="T7">v</text:span> on ominaistilavuus [m³/kg], <text:span text:style-name="T7">R</text:span> on ainekohtainen kaasuvakio [J/(kgK)] ja <text:span text:style-name="T7">T</text:span> on lämpötila [K]. </text:p>
      <text:p text:style-name="LUT_20_Normal_20_Times_20_New_20_Roman_20_12"><text:bookmark-start text:name="_Hlk90904596"/><text:bookmark-start text:name="_Hlk90904242"/>Kun kirjoitat symboleita opinnäytetyöhösi, <text:span text:style-name="T33">suositeltavaa on tarkistaa kirjoitusasu MS Wordin kaavaeditorilla. Se noudattaa yleisiä symbolien kirjoitusasua koskevia sääntöjä, esim.</text:span></text:p>
      <text:list text:style-name="WWNum8">
        <text:list-item>
          <text:p text:style-name="P48">Skalaarimuuttujat kirjoitetaan kursiivilla, vektorimuuttujat lihavoituna, ei kursiivilla. Dimensiottomia lukuja ei kursivoida.</text:p>
        </text:list-item>
        <text:list-item>
          <text:p text:style-name="P48">Alaindeksit kirjoitetaan roomalaisittain pystyyn elleivät ole indeksejä, jotka kirjoitetaan kursiivilla (italic style). Lyhennetyt alaindeksit ja numerot kirjoitetaan esim. <text:span text:style-name="normaltextrun"><text:span text:style-name="T34">Δ</text:span></text:span><text:span text:style-name="normaltextrun"><text:span text:style-name="T35">σ</text:span></text:span><text:span text:style-name="normaltextrun"><text:span text:style-name="T36">w</text:span></text:span><text:span text:style-name="normaltextrun"><text:span text:style-name="T37">, σ</text:span></text:span><text:span text:style-name="normaltextrun"><text:span text:style-name="T36">1</text:span></text:span><text:span text:style-name="normaltextrun"><text:span text:style-name="T37">, σ</text:span></text:span><text:span text:style-name="normaltextrun"><text:span text:style-name="T36">min</text:span></text:span><text:span text:style-name="normaltextrun"><text:span text:style-name="T38">. Esim. summalausekkeessa </text:span></text:span><draw:frame draw:style-name="fr2" draw:name="Object1" text:anchor-type="as-char" svg:width="0.348in" svg:height="0.452in" draw:z-index="2"><draw:object xlink:href="./Object 1" xlink:type="simple" xlink:show="embed" xlink:actuate="onLoad"/><draw:image xlink:href="./ObjectReplacements/Object 1" xlink:type="simple" xlink:show="embed" xlink:actuate="onLoad"/></draw:frame><text:span text:style-name="normaltextrun"><text:span text:style-name="T38"><text:s/>alaindeksi </text:span></text:span><text:span text:style-name="normaltextrun"><text:span text:style-name="T39">i</text:span></text:span><text:span text:style-name="normaltextrun"><text:span text:style-name="T40"> </text:span></text:span><text:span text:style-name="normaltextrun"><text:span text:style-name="T41">kirjoitetaan kursiivilla, koska se edustaa muuttujaa.</text:span></text:span><text:bookmark-end text:name="_Hlk90904596"/></text:p>
        </text:list-item>
        <text:list-item>
          <text:p text:style-name="P48"><text:soft-page-break/>Jos halutaan ilmaista muutosta esim. paineessa Δ<text:span text:style-name="T7">p</text:span> Δ kirjoitetaan roomalaisittain. Joissain tapauksissa <text:span text:style-name="T7">Δ</text:span> voi olla myös muuttuja, jolloin se kirjoitetaan kursiivilla. <text:span text:style-name="T11"></text:span> on ympyrän kehän ja halkaisijan suhde. <text:span text:style-name="T42"></text:span> on sen sijaan esim. painesuhde.</text:p>
        </text:list-item>
        <text:list-item>
          <text:p text:style-name="P48">Matemaattisia operaattoreita ei kursivoida esim. sin <text:span text:style-name="T7">x</text:span>, tai lg <text:span text:style-name="T7">y</text:span></text:p>
        </text:list-item>
        <text:list-item>
          <text:p text:style-name="P48" loext:marker-style-name="T43">Absoluuttiset arvot erotetaan seuraavasti: ”muuttuja_=_numero_yksikkö”, lukuun ottamatta luvun viereen sijoitettavaa prosenttimerkkiä, esimerkiksi <text:span text:style-name="T7">a</text:span> = 5,2 mm, <text:span text:style-name="T42"></text:span> = 97,7 %.</text:p>
        </text:list-item>
        <text:list-item>
          <text:p text:style-name="P48">Desimaalierottimena käytetään pistettä (”.”) kansainvälisten standardien mukaan. Suomenkielisessä opinnäytetyössä suositeltu desinaalierotin on kuitenkin pilkku ”,”. Tämä suositus kattaa myös kuvat ja taulukot.</text:p>
        </text:list-item>
      </text:list>
      <text:p text:style-name="P49"><text:bookmark-end text:name="_Hlk90904242"/></text:p>
      <text:p text:style-name="LUT_20_Normal_20_Times_20_New_20_Roman_20_12" loext:marker-style-name="T30"><text:span text:style-name="T30">Symboli- ja lyhenneluettelo</text:span><text:span text:style-name="T30"/></text:p>
      <text:p text:style-name="LUT_20_Normal_20_Times_20_New_20_Roman_20_12">Symbolit ja lyhenteet sekä niiden määritelmät, jotka eivät ole yleistietoa, luetellaan erillisessä luettelossa omalla sivullaan ennen sisällysluetteloa. Ne järjestetään ryhmiin: esimerkiksi ensin roomalaiset symbolit, sitten kreikkalaiset ja lopuksi lyhenteet. Huomaa, että sivu tulee nimetä symboliluetteloksi, jos luettelossa ei ole lyhenteitä ja lyhenneluetteloksi, jos siinä ei ole symboleita. </text:p>
      <text:p text:style-name="LUT_20_Normal_20_Times_20_New_20_Roman_20_12">Kun symboli tai lyhenne näkyy ensimmäistä kertaa tekstissä, sen merkitys tulee avata lukijalle. Esimerkiksi näin: ”Ympäristövaikutuksia arvioinut Suomen Ympäristökeskus (SYKE) on...”. Tämän jälkeen vain lyhenne toistuu tekstissä ja lukija voi tarkistaa merkityksen luettelosta. Symbolien ja lyhenteiden luetteloon ei voi sisältyä termejä, joita ei ole mainittu päätekstissä.</text:p>
      <text:p text:style-name="LUT_20_Normal_20_Times_20_New_20_Roman_20_12"><text:s/></text:p>
      <text:p text:style-name="P50">Liite 4. Opinnäytetyön liitteet</text:p>
      <text:p text:style-name="LUT_20_Normal_20_Times_20_New_20_Roman_20_12">Liitteisiin tulevat esim. haastattelukysymykset, kyselylomakkeet yms. työn kannalta oleelliset sisällöt, joita ei kuitenkaan ole mielekästä esittää varsinaisen tekstin joukossa.</text:p>
      <text:p text:style-name="LUT_20_Normal_20_Times_20_New_20_Roman_20_12">Opinnäytetyöhön sisällytettäviin liitteisiin tulee viitata tekstissä mainiten ne esimerkiksi suluissa (liite 1) siinä asiayhteydessä, mihin ne liittyvät. Kaikki liitteet nimetään niiden sisällön perusteella ja sisällysluettelossa luetellaan liitteinä esitettävät dokumentit siinä järjestyksessä kuin ne esiintyvät tekstissä.</text:p>
      <text:p text:style-name="LUT_20_Normal_20_Times_20_New_20_Roman_20_12">Jos liite on yksisivuinen, siihen ei laiteta sivunumeroa. Jos liite on useasivuinen, siihen täytyy laittaa sivunumerointi.</text:p>
      <text:p text:style-name="LUT_20_Normal_20_Times_20_New_20_Roman_20_12"/>
      <text:p text:style-name="P51">Liite 5. Opinnäytetyön julkaiseminen</text:p>
      <text:p text:style-name="LUT_20_Normal_20_Times_20_New_20_Roman_20_12">LUTin tutkintosäännön mukaan kandidaatin tutkielma sekä pro gradu ja diplomityö ovat julkisia opinnäytteitä. Työ julkaistaan LUTPub-julkaisuarkistossa, mihin liittyvät ohjeet löytyvät <text:a xlink:type="simple" xlink:href="https://libguides.lut.fi/lutpub/opinnaytetyot" text:style-name="Internet_20_link" text:visited-style-name="Visited_20_Internet_20_Link"><text:span text:style-name="Internet_20_link">kirjaston www-sivuilta</text:span></text:a>.</text:p>
      <text:p text:style-name="LUT_20_Normal_20_Times_20_New_20_Roman_20_12">Huolehdi opinnäytetyösi tarkastajan kanssa, että tutkimuksesi julkisuuteen liittyvät asiat ovat mahdollisen työn toimeksiantajan tiedossa heti neuvottelujen alkuvaiheessa. Mikäli raporttiin joudutaan välttämättömistä syistä sisällyttämään tietoa, jonka työn teettäjä vaatii pidettävän salaisena, voidaan diplomityö tai pro gradu -tutkielma yliopiston puolesta suostua pitämään luottamuksellisena enintään kahden vuoden ajan. Tällöin työn toimeksiantajan on tehtävä yliopistolle kirjallinen luottamuksellisuusselvitys. Opiskelija vastaa luottamuksellisuusselvityksen toimittamisesta yliopiston opiskelijapalveluihin viimeistään työn arvosteluanomuksen yhteydessä. Selvityksestä täytyy ilmetä luottamuksellisuuden laajuus, perustelut ja luottamuksellisuusaika täysinä vuosina. Luottamuksellisuusaika alkaa siitä päivästä, jolloin opinnäyte on arvosteltu. Yli kaksi vuotta luottamuksellisina pidettävät tiedot on jätettävä pois opinnäytteenä arvosteltavasta raportista. Raportti arvostellaan arvosteluun jätetyn version perusteella.</text:p>
      <text:p text:style-name="LUT_20_Normal_20_Times_20_New_20_Roman_20_12">Kaikki LUTPubissa julkaistavien opinnäytetöiden tulee täyttää saavutettavuuteen liittyvät vaatimukset. Tekstisi tulee olla mahdollisimman hyvin luettavissa lukulaitteilla, joten muistathan</text:p>
      <text:list text:style-name="WWNum9">
        <text:list-item>
          <text:p text:style-name="P52">käyttää aina tyylejä tekstisi otsikoinneissa, tähän dokumenttiin on tallennettu LUTin opinnäytetyöpohjassa käytettävät tyylit</text:p>
        </text:list-item>
        <text:list-item>
          <text:p text:style-name="P52">upottaa tekstissä olevat hyperlinkit tekstiin tai linkitettävän sisällön kuvaukseen, URL-osoitteita tekstissä ei saisi olla. </text:p>
        </text:list-item>
        <text:list-item>
          <text:p text:style-name="P52">lisätä / tarkistaa tekstivastineet (Alt-teksti, vaihtoehtoinen teksti) kuviin sekä taulukoihin, tekstivastineeseen kirjoitetaan lyhyesti kuvan/taulukon olennainen sisältö.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fi" fo:country="FI"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9055in" style:writing-mode="lr-tb"/>
      <style:text-properties style:use-window-font-color="true" loext:opacity="0%" style:font-name="Calibri" fo:font-size="11pt" fo:language="fi" fo:country="FI"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page" loext:hyphenation-keep-type="column" loext:hyphenation-keep-line="true" style:writing-mode="lr-tb"/>
      <style:text-properties style:font-name="Times New Roman" fo:font-family="'Times New Roman'" style:font-family-generic="roman" style:font-pitch="variable" fo:font-size="12pt" style:font-size-asian="12pt"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WWNum10" style:list-level="4" style:class="chapter">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WWNum10" style:list-level="5" style:class="chapter">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Subtitle" style:family="paragraph" style:parent-style-name="Standard" style:next-style-name="Standard" loext:linked-style-name="Subtitle_20_Char" style:class="chapter">
      <style:text-properties fo:color="#5a5a5a" loext:opacity="100%" fo:letter-spacing="0.0102in"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LUT_20_Normal_20_Times_20_New_20_Roman_20_12" style:next-style-name="Standard" style:auto-update="true" style:class="index">
      <style:paragraph-properties fo:margin-top="0in" fo:margin-bottom="0in" style:contextual-spacing="false">
        <style:tab-stops>
          <style:tab-stop style:position="0.3055in"/>
          <style:tab-stop style:position="6.0953in" style:type="right" style:leader-style="dotted" style:leader-text="."/>
        </style:tab-stops>
      </style:paragraph-properties>
    </style:style>
    <style:style style:name="Contents_20_2" style:display-name="Contents 2" style:family="paragraph" style:parent-style-name="LUT_20_Normal_20_Times_20_New_20_Roman_20_12" style:next-style-name="Standard" style:auto-update="true" style:class="index">
      <style:paragraph-properties fo:margin-left="0.1535in" fo:margin-top="0in" fo:margin-bottom="0in" style:contextual-spacing="false"/>
    </style:style>
    <style:style style:name="Contents_20_3" style:display-name="Contents 3" style:family="paragraph" style:parent-style-name="LUT_20_Normal_20_Times_20_New_20_Roman_20_12" style:next-style-name="Standard" style:auto-update="true" style:class="index">
      <style:paragraph-properties fo:margin-left="0.3071in" fo:margin-top="0in" fo:margin-bottom="0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UT_20_Heading_20_1" style:display-name="LUT Heading 1" style:family="paragraph" style:parent-style-name="Heading_20_1" style:next-style-name="LUT_20_Normal_20_Times_20_New_20_Roman_20_12" loext:linked-style-name="LUT_20_Heading_20_1_20_Char" style:list-style-name="WWNum10">
      <style:paragraph-properties fo:margin-top="0.25in" fo:margin-bottom="0.5in" style:contextual-spacing="false" fo:line-height="200%"/>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UT_20_Heading_20_2" style:display-name="LUT Heading 2" style:family="paragraph" style:parent-style-name="Heading_20_2" style:next-style-name="LUT_20_Normal_20_Times_20_New_20_Roman_20_12" loext:linked-style-name="LUT_20_Heading_20_2_20_Char" style:list-style-name="WWNum10" style:list-level="2">
      <style:paragraph-properties fo:margin-top="0.3335in" fo:margin-bottom="0.3335in" style:contextual-spacing="false" fo:line-height="150%" fo:text-align="justify" style:justify-single-word="false" loext:word-spacing-minimum="75%" loext:word-spacing-maximum="133%"/>
      <style:text-properties style:use-window-font-color="true" loext:opacity="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UT_20_Heading_20_3" style:display-name="LUT Heading 3" style:family="paragraph" style:parent-style-name="Heading_20_3" style:next-style-name="LUT_20_Normal_20_Times_20_New_20_Roman_20_12" loext:linked-style-name="LUT_20_Heading_20_3_20_Char" style:list-style-name="WWNum10" style:list-level="3">
      <style:paragraph-properties fo:margin-top="0.3335in" fo:margin-bottom="0.3335in" style:contextual-spacing="false" fo:line-height="150%" fo:text-align="justify" style:justify-single-word="false" loext:word-spacing-minimum="75%" loext:word-spacing-maximum="133%"/>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UT_20_Normal_20_Times_20_New_20_Roman_20_12" style:display-name="LUT Normal Times New Roman 12" style:family="paragraph" style:parent-style-name="Standard" loext:linked-style-name="LUT_20_Normal_20_Times_20_New_20_Roman_20_12_20_Char">
      <style:paragraph-properties fo:line-height="150%" fo:text-align="justify" style:justify-single-word="false" loext:word-spacing-minimum="75%" loext:word-spacing-maximum="133%"/>
      <style:text-properties style:font-name-complex="Times New Roman1" style:font-family-complex="'Times New Roman'" style:font-family-generic-complex="system" style:font-pitch-complex="variable" style:font-size-complex="12pt"/>
    </style:style>
    <style:style style:name="LUT_20_Liitteet" style:display-name="LUT Liitteet" style:family="paragraph" style:parent-style-name="LUT_20_Normal_20_Times_20_New_20_Roman_20_12" style:next-style-name="LUT_20_Normal_20_Times_20_New_20_Roman_20_12" loext:linked-style-name="LUT_20_Liitteet_20_Char">
      <style:paragraph-properties fo:margin-top="0in" fo:margin-bottom="0.3335in" style:contextual-spacing="false"/>
    </style:style>
    <style:style style:name="Normal_20__28_Web_29_" style:display-name="Normal (Web)" style:family="paragraph" style:parent-style-name="Standard">
      <style:text-properties style:font-name-complex="Times New Roman1" style:font-family-complex="'Times New Roman'" style:font-family-generic-complex="system" style:font-pitch-complex="variable" style:font-size-complex="12pt"/>
    </style:style>
    <style:style style:name="LUT_20_HeaderFooter" style:display-name="LUT HeaderFooter" style:family="paragraph" style:parent-style-name="Header" loext:linked-style-name="LUT_20_HeaderFooter_20_Char">
      <style:paragraph-properties fo:text-align="end" style:justify-single-word="false"/>
    </style:style>
    <style:style style:name="Contents_20_4" style:display-name="Contents 4" style:family="paragraph" style:parent-style-name="LUT_20_Normal_20_Times_20_New_20_Roman_20_12" style:next-style-name="Standard" style:auto-update="true" style:class="index">
      <style:paragraph-properties fo:margin-left="0.4571in" fo:margin-top="0in" fo:margin-bottom="0in" style:contextual-spacing="false"/>
    </style:style>
    <style:style style:name="LUT_20_Heading" style:display-name="LUT Heading" style:family="paragraph" style:parent-style-name="LUT_20_Heading_20_1" loext:linked-style-name="LUT_20_Heading_20_Char" style:list-style-name="">
      <style:paragraph-properties fo:margin-left="0.3937in" fo:text-indent="-0.3937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in" fo:margin-top="0in" fo:margin-bottom="0.1665in" style:contextual-spacing="false" style:line-height-at-least="0.1665in" fo:text-indent="0in"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ubtitle_20_Char" style:display-name="Subtitle Char" style:family="text" style:parent-style-name="Default_20_Paragraph_20_Font" loext:linked-style-name="Subtitle">
      <style:text-properties fo:color="#5a5a5a" loext:opacity="100%" fo:letter-spacing="0.0102in"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normaltextrun"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UT_20_Heading_20_1_20_Char" style:display-name="LUT Heading 1 Char" style:family="text" style:parent-style-name="Default_20_Paragraph_20_Font" loext:linked-style-name="LUT_20_Heading_20_1">
      <style:text-properties style:font-name="Times New Roman" fo:font-family="'Times New Roman'" style:font-family-generic="roman" style:font-pitch="variable" fo:font-size="16pt"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UT_20_Heading_20_2_20_Char" style:display-name="LUT Heading 2 Char" style:family="text" style:parent-style-name="Heading_20_2_20_Char" loext:linked-style-name="LUT_20_Heading_20_2">
      <style:text-properties fo:color="#2f5496"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UT_20_Heading_20_3_20_Char" style:display-name="LUT Heading 3 Char" style:family="text" style:parent-style-name="Heading_20_3_20_Char" loext:linked-style-name="LUT_20_Heading_20_3">
      <style:text-properties fo:color="#1f3763"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UT_20_Normal_20_Times_20_New_20_Roman_20_12_20_Char" style:display-name="LUT Normal Times New Roman 12 Char" style:family="text" style:parent-style-name="Default_20_Paragraph_20_Font" loext:linked-style-name="LUT_20_Normal_20_Times_20_New_20_Roman_20_12">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UT_20_Liitteet_20_Char" style:display-name="LUT Liitteet Char" style:family="text" style:parent-style-name="LUT_20_Heading_20_2_20_Char" loext:linked-style-name="LUT_20_Liitteet">
      <style:text-properties fo:color="#2f5496"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LUT_20_HeaderFooter_20_Char" style:display-name="LUT HeaderFooter Char" style:family="text" style:parent-style-name="Header_20_Char" loext:linked-style-name="LUT_20_HeaderFooter">
      <style:text-properties style:font-name="Times New Roman" fo:font-family="'Times New Roman'" style:font-family-generic="roman" style:font-pitch="variable" fo:font-size="12pt" style:font-size-asian="12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LUT_20_Heading_20_Char" style:display-name="LUT Heading Char" style:family="text" style:parent-style-name="LUT_20_Heading_20_1_20_Char" loext:linked-style-name="LUT_20_Heading">
      <style:text-properties style:font-name="Times New Roman" fo:font-family="'Times New Roman'" style:font-family-generic="roman" style:font-pitch="variable" fo:font-size="16pt"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istLabel_20_1" style:display-name="ListLabel 1"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text-properties fo:language="en" fo:country="GB"/>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language="en" fo:country="GB"/>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background-color="#ffff00"/>
    </style:style>
    <style:style style:name="ListLabel_20_110" style:display-name="ListLabel 110"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571in" fo:margin-left="1.0071in"/>
        </style:list-level-properties>
        <style:text-properties fo:font-family="'Times New Roman'" style:font-style-name="Regular" style:font-family-generic="roman"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7571in" fo:margin-left="1.0071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405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9055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405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9055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405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9055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405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9055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405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 style:num-suffix=" "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83" loext:num-list-format="%1%.%2% " style:num-suffix=" "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ListLabel_20_84" loext:num-list-format="%1%.%2%.%3% " style:num-suffix=" " style:num-format="1" text:display-levels="3">
        <style:list-level-properties text:list-level-position-and-space-mode="label-alignment">
          <style:list-level-label-alignment text:label-followed-by="listtab" fo:text-indent="-0.4925in" fo:margin-left="0.8862in"/>
        </style:list-level-properties>
      </text:list-level-style-number>
      <text:list-level-style-number text:level="4" text:style-name="ListLabel_20_85" loext:num-list-format="(%4%)" style:num-prefix="(" style:num-suffix=")" style:num-format="a" style:num-letter-sync="true">
        <style:list-level-properties text:list-level-position-and-space-mode="label-alignment">
          <style:list-level-label-alignment text:label-followed-by="listtab" fo:text-indent="-0.2953in" fo:margin-left="1.1811in"/>
        </style:list-level-properties>
      </text:list-level-style-number>
      <text:list-level-style-number text:level="5" text:style-name="ListLabel_20_86" loext:num-list-format="(%5%)" style:num-prefix="(" style:num-suffix=")" style:num-format="i">
        <style:list-level-properties text:list-level-position-and-space-mode="label-alignment">
          <style:list-level-label-alignment text:label-followed-by="listtab" fo:text-indent="-0.3937in" fo:margin-left="1.5752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 style:num-suffix=" "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101" loext:num-list-format="%1%.%2% " style:num-suffix=" "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ListLabel_20_102" loext:num-list-format="%1%.%2%.%3% " style:num-suffix=" " style:num-format="1" text:display-levels="3">
        <style:list-level-properties text:list-level-position-and-space-mode="label-alignment">
          <style:list-level-label-alignment text:label-followed-by="listtab" fo:text-indent="-0.4925in" fo:margin-left="0.8862in"/>
        </style:list-level-properties>
      </text:list-level-style-number>
      <text:list-level-style-number text:level="4" text:style-name="ListLabel_20_103" loext:num-list-format="(%4%)" style:num-prefix="(" style:num-suffix=")" style:num-format="a" style:num-letter-sync="true">
        <style:list-level-properties text:list-level-position-and-space-mode="label-alignment">
          <style:list-level-label-alignment text:label-followed-by="listtab" fo:text-indent="-0.2953in" fo:margin-left="1.1811in"/>
        </style:list-level-properties>
      </text:list-level-style-number>
      <text:list-level-style-number text:level="5" text:style-name="ListLabel_20_104" loext:num-list-format="(%5%)" style:num-prefix="(" style:num-suffix=")" style:num-format="i">
        <style:list-level-properties text:list-level-position-and-space-mode="label-alignment">
          <style:list-level-label-alignment text:label-followed-by="listtab" fo:text-indent="-0.3937in" fo:margin-left="1.5752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text-properties style:font-name-complex="Times New Roman1" style:font-size-complex="12pt"/>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17in" fo:margin-bottom="0.4917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866in" fo:margin-left="0in" fo:margin-right="0in" fo:margin-bottom="0.8472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UT_20_HeaderFooter"/>
      </style:header>
      <style:footer>
        <text:p text:style-name="Footer"/>
      </style:footer>
    </style:master-page>
    <style:master-page style:name="Converted1" style:page-layout-name="Mpm1" draw:style-name="Mdp1">
      <style:header>
        <text:p text:style-name="LUT_20_HeaderFooter"><text:span text:style-name="LUT_20_HeaderFooter_20_Char"><text:page-number text:select-page="current">21</text:page-number></text:span></text:p>
      </style:header>
      <style:footer>
        <text:p text:style-name="Footer"/>
      </style:footer>
    </style:master-page>
    <style:master-page style:name="Converted2" style:page-layout-name="Mpm1" draw:style-name="Mdp1">
      <style:header>
        <text:p text:style-name="MP1" loext:marker-style-name="MT1"><text:span text:style-name="MT1"><text:page-number text:select-page="current">2</text:page-number></text:span></text:p>
        <text:p text:style-name="MP2" loext:marker-style-name="MT1"/>
      </style:header>
      <style:footer>
        <text:p text:style-name="Footer"/>
      </style:footer>
    </style:master-page>
    <style:master-page style:name="Converted3" style:page-layout-name="Mpm1" draw:style-name="Mdp1">
      <style:header>
        <text:p text:style-name="MP1" loext:marker-style-name="MT1"><text:span text:style-name="MT1"><text:page-number text:select-page="current">2</text:page-number></text:span></text:p>
        <text:p text:style-name="MP2" loext:marker-style-name="MT1"/>
      </style:header>
      <style:footer>
        <text:p text:style-name="Footer"/>
      </style:footer>
    </style:master-page>
    <style:master-page style:name="Converted4" style:page-layout-name="Mpm1" draw:style-name="Mdp1">
      <style:header>
        <text:p text:style-name="MP1" loext:marker-style-name="MT1"><text:span text:style-name="MT1"><text:page-number text:select-page="current">4</text:page-number></text:span></text:p>
        <text:p text:style-name="MP2" loext:marker-style-name="MT1"/>
      </style:header>
      <style:footer>
        <text:p text:style-name="Footer"/>
      </style:footer>
    </style:master-page>
    <style:master-page style:name="Converted5" style:page-layout-name="Mpm1" draw:style-name="Mdp1">
      <style:header>
        <text:p text:style-name="MP2" loext:marker-style-name="MT1"/>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nnikka Nurkka</meta:initial-creator>
    <meta:editing-cycles>23</meta:editing-cycles>
    <meta:print-date>2021-11-10T11:54:00</meta:print-date>
    <meta:creation-date>2022-04-25T10:08:00</meta:creation-date>
    <dc:date>2026-06-23T17:32:33.780901000</dc:date>
    <meta:editing-duration>PT6H9M59S</meta:editing-duration>
    <meta:generator>LibreOffice/25.8.7.3$Windows_X86_64 LibreOffice_project/30742500f2d3eb4366ac312fa33d3dcabdb3eba5</meta:generator>
    <meta:document-statistic meta:table-count="1" meta:image-count="2" meta:object-count="1" meta:page-count="32" meta:paragraph-count="257" meta:word-count="3758" meta:character-count="29529" meta:non-whitespace-character-count="25972"/>
    <meta:user-defined meta:name="AppVersion">16.0000</meta:user-defined>
    <meta:user-defined meta:name="ZOTERO_PREF_1">&lt;data data-version="3" zotero-version="9.0.5"&gt;&lt;session id="VJCnnSSB"/&gt;&lt;style id="http://www.zotero.org/styles/oxford-brookes-university-harvard" hasBibliography="1" bibliographyStyleHasBeenSet="1"/&gt;&lt;prefs&gt;&lt;pref name="fieldType" value="ReferenceMark"/&gt;&lt;/pr</meta:user-defined>
    <meta:user-defined meta:name="ZOTERO_PREF_2">efs&gt;&lt;/data&gt;</meta:user-defined>
    <meta:template xlink:type="simple" xlink:actuate="onRequest" xlink:title="Normal.dotm" xlink:href=""/>
  </office:meta>
</office:document-meta>
</file>

<file path=Object 1/content.xml><?xml version="1.0" encoding="utf-8"?>
<math xmlns="http://www.w3.org/1998/Math/MathML" display="block">
  <semantics>
    <mrow>
      <munderover>
        <mo stretchy="false">∑</mo>
        <mi>i</mi>
        <mi>∞</mi>
      </munderover>
      <msub>
        <mi>x</mi>
        <mi>i</mi>
      </msub>
    </mrow>
    <annotation encoding="StarMath 5.0">sum from {i} to {∞} {{x} rsub {i}}</annotation>
  </semantics>
</math>
</file>