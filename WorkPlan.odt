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chedule" style:family="table">
      <style:table-properties style:width="6.6931in" table:align="margins"/>
    </style:style>
    <style:style style:name="Schedule.A" style:family="table-column">
      <style:table-column-properties style:column-width="1.4361in" style:rel-column-width="14065*"/>
    </style:style>
    <style:style style:name="Schedule.B" style:family="table-column">
      <style:table-column-properties style:column-width="3.0222in" style:rel-column-width="29590*"/>
    </style:style>
    <style:style style:name="Schedule.C" style:family="table-column">
      <style:table-column-properties style:column-width="2.2347in" style:rel-column-width="21880*"/>
    </style:style>
    <style:style style:name="Schedule.A1" style:family="table-cell">
      <style:table-cell-properties fo:padding="0in" fo:border="none" style:writing-mode="page"/>
    </style:style>
    <style:style style:name="Schedule.2" style:family="table-row">
      <style:table-row-properties style:min-row-height="0.3708in"/>
    </style:style>
    <style:style style:name="Schedule.12" style:family="table-row">
      <style:table-row-properties style:min-row-height="0.2625in"/>
    </style:style>
    <style:style style:name="Schedule.14" style:family="table-row">
      <style:table-row-properties style:min-row-height="0.8042in"/>
    </style:style>
    <style:style style:name="P1" style:family="paragraph" style:parent-style-name="Standard">
      <style:text-properties officeooo:rsid="001c5006" officeooo:paragraph-rsid="001c5006"/>
    </style:style>
    <style:style style:name="P2" style:family="paragraph" style:parent-style-name="Standard">
      <style:text-properties officeooo:rsid="001dc910" officeooo:paragraph-rsid="001dc910"/>
    </style:style>
    <style:style style:name="P3" style:family="paragraph" style:parent-style-name="Table_20_Contents">
      <style:text-properties officeooo:rsid="001dc910" officeooo:paragraph-rsid="001dc910"/>
    </style:style>
    <style:style style:name="P4" style:family="paragraph" style:parent-style-name="Table_20_Contents">
      <style:text-properties officeooo:rsid="001f0119" officeooo:paragraph-rsid="001f0119"/>
    </style:style>
    <style:style style:name="P5" style:family="paragraph" style:parent-style-name="Table_20_Contents">
      <style:text-properties officeooo:rsid="001dc910" officeooo:paragraph-rsid="001f0119"/>
    </style:style>
    <style:style style:name="P6" style:family="paragraph" style:parent-style-name="Standard">
      <style:text-properties fo:font-style="italic" officeooo:rsid="00210986" officeooo:paragraph-rsid="00210986" style:font-style-asian="italic" style:font-style-complex="italic"/>
    </style:style>
    <style:style style:name="P7" style:family="paragraph" style:parent-style-name="Standard">
      <style:paragraph-properties fo:break-before="page"/>
      <style:text-properties officeooo:rsid="001f35a7" officeooo:paragraph-rsid="001f35a7"/>
    </style:style>
    <style:style style:name="P8" style:family="paragraph" style:parent-style-name="Standard">
      <style:text-properties officeooo:rsid="001f35a7" officeooo:paragraph-rsid="00260a57"/>
    </style:style>
    <style:style style:name="P9" style:family="paragraph" style:parent-style-name="Standard">
      <style:text-properties officeooo:paragraph-rsid="00260a57"/>
    </style:style>
    <style:style style:name="P10" style:family="paragraph" style:parent-style-name="Standard">
      <style:text-properties officeooo:rsid="001f35a7" officeooo:paragraph-rsid="001f35a7"/>
    </style:style>
    <style:style style:name="P11" style:family="paragraph" style:parent-style-name="Standard">
      <style:text-properties officeooo:paragraph-rsid="002a9069"/>
    </style:style>
    <style:style style:name="P12" style:family="paragraph" style:parent-style-name="Standard">
      <style:text-properties officeooo:rsid="002d1cf8" officeooo:paragraph-rsid="002d1cf8"/>
    </style:style>
    <style:style style:name="P13" style:family="paragraph" style:parent-style-name="Standard">
      <style:text-properties officeooo:paragraph-rsid="002d1cf8"/>
    </style:style>
    <style:style style:name="P14" style:family="paragraph" style:parent-style-name="Standard">
      <style:text-properties officeooo:rsid="0022dcca" officeooo:paragraph-rsid="0022dcca"/>
    </style:style>
    <style:style style:name="T1" style:family="text">
      <style:text-properties officeooo:rsid="001dc910"/>
    </style:style>
    <style:style style:name="T2" style:family="text">
      <style:text-properties officeooo:rsid="001f35a7"/>
    </style:style>
    <style:style style:name="T3" style:family="text">
      <style:text-properties officeooo:rsid="001f1613"/>
    </style:style>
    <style:style style:name="T4" style:family="text">
      <style:text-properties officeooo:rsid="001f0119"/>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260a57"/>
    </style:style>
    <style:style style:name="T8" style:family="text">
      <style:text-properties officeooo:rsid="002a9069"/>
    </style:style>
    <style:style style:name="T9" style:family="text">
      <style:text-properties fo:font-style="italic" officeooo:rsid="002a9069" style:font-style-asian="italic" style:font-style-complex="italic"/>
    </style:style>
    <style:style style:name="T10" style:family="text">
      <style:text-properties fo:font-style="normal" officeooo:rsid="002a9069" style:font-style-asian="normal" style:font-style-complex="normal"/>
    </style:style>
    <style:style style:name="T11" style:family="text">
      <style:text-properties officeooo:rsid="002bf4b2"/>
    </style:style>
    <style:style style:name="T12" style:family="text">
      <style:text-properties fo:font-variant="normal" fo:text-transform="none" style:text-position="0% 100%" style:text-underline-style="none" fo:font-weight="normal"/>
    </style:style>
    <style:style style:name="T13" style:family="text">
      <style:text-properties fo:font-variant="normal" fo:text-transform="none" style:text-position="0% 100%" fo:font-style="italic" style:text-underline-style="none" fo:font-weight="normal" style:font-style-asian="italic"/>
    </style:style>
    <style:style style:name="T14" style:family="text">
      <style:text-properties fo:font-style="italic" officeooo:rsid="002d1cf8" style:font-style-asian="italic" style:font-style-complex="italic"/>
    </style:style>
    <style:style style:name="T15" style:family="text">
      <style:text-properties officeooo:rsid="002d1cf8"/>
    </style:style>
    <style:style style:name="T16" style:family="text">
      <style:text-properties officeooo:rsid="002f34f2"/>
    </style:style>
    <style:style style:name="T17" style:family="text">
      <style:text-properties officeooo:rsid="002e76ec"/>
    </style:style>
    <style:style style:name="T18"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AI <text:span text:style-name="T1">sensor </text:span><text:span text:style-name="T2">and communication</text:span><text:span text:style-name="T1"> systems simulated in </text:span>game engine<text:span text:style-name="T1">s</text:span> (Godot/Unreal/Unity)</text:p>
      <text:p text:style-name="P1">Desc.: Making a module/addon that has different AI’s as plug-and-play components that can be used freely and run on local system. This should make NPC’s easier and feel more living. <text:span text:style-name="T1">These AIs are focused on sensor data expect one that is to use in communicating.</text:span> Different types AI’s planned: Machine vision, sound synthesizer, machine hearing, and LLM.</text:p>
      <text:p text:style-name="P1"/>
      <text:p text:style-name="P1">Research goals:</text:p>
      <text:p text:style-name="P1">* (Main) Can AI systems be implemented as plug-and-play components while allowing them to run on local systems.</text:p>
      <text:p text:style-name="P1">* How much resources must be used while using such AI’s <text:span text:style-name="T1">and how to optimize them.</text:span></text:p>
      <text:p text:style-name="P1">* How do these AI’s affect the environment/entity they are put in</text:p>
      <text:p text:style-name="P1">* Can there be central logic unit that receives all information from the AI’s and use it to navigate simulation</text:p>
      <text:p text:style-name="P1">* Can this research be continued into real world robotics.</text:p>
      <text:p text:style-name="P1"/>
      <text:p text:style-name="P2">Tools used:</text:p>
      <text:p text:style-name="P2">* Godot, Unreal, Unity (Game Engines)</text:p>
      <text:p text:style-name="P2">* visual studio code (main coding)</text:p>
      <text:p text:style-name="P2">* GitHub (version control)</text:p>
      <text:p text:style-name="P2">* AI models (Gemma 4:e4b, and other <text:span text:style-name="T3">open source that will be figured out later</text:span>)</text:p>
      <text:p text:style-name="P2"/>
      <text:p text:style-name="P2">Timetable:</text:p>
      <table:table table:name="Schedule" table:style-name="Schedule">
        <table:table-column table:style-name="Schedule.A"/>
        <table:table-column table:style-name="Schedule.B"/>
        <table:table-column table:style-name="Schedule.C"/>
        <table:table-row>
          <table:table-cell table:style-name="Schedule.A1" office:value-type="string">
            <text:p text:style-name="P3">Name</text:p>
          </table:table-cell>
          <table:table-cell table:style-name="Schedule.A1" office:value-type="string">
            <text:p text:style-name="P3">Desc.</text:p>
          </table:table-cell>
          <table:table-cell table:style-name="Schedule.A1" office:value-type="string">
            <text:p text:style-name="P3">Date/<text:span text:style-name="T4">deadline</text:span></text:p>
          </table:table-cell>
        </table:table-row>
        <table:table-row table:style-name="Schedule.2">
          <table:table-cell table:style-name="Schedule.A1" office:value-type="string">
            <text:p text:style-name="P4">Planed</text:p>
          </table:table-cell>
          <table:table-cell table:style-name="Schedule.A1" office:value-type="string">
            <text:p text:style-name="P3">Publish work plan</text:p>
          </table:table-cell>
          <table:table-cell table:style-name="Schedule.A1" office:value-type="string">
            <text:p text:style-name="P3">25-5-2026</text:p>
          </table:table-cell>
        </table:table-row>
        <table:table-row table:style-name="Schedule.2">
          <table:table-cell table:style-name="Schedule.A1" office:value-type="string">
            <text:p text:style-name="P5"><text:span text:style-name="T4">Official </text:span>Start</text:p>
          </table:table-cell>
          <table:table-cell table:style-name="Schedule.A1" office:value-type="string">
            <text:p text:style-name="P4">Lets do this.</text:p>
          </table:table-cell>
          <table:table-cell table:style-name="Schedule.A1" office:value-type="string">
            <text:p text:style-name="P4">1-6-2026</text:p>
          </table:table-cell>
        </table:table-row>
        <table:table-row>
          <table:table-cell table:style-name="Schedule.A1" office:value-type="string">
            <text:p text:style-name="P3">Foundation</text:p>
          </table:table-cell>
          <table:table-cell table:style-name="Schedule.A1" office:value-type="string">
            <text:p text:style-name="P3">Write methodology and related research</text:p>
          </table:table-cell>
          <table:table-cell table:style-name="Schedule.A1" office:value-type="string">
            <text:p text:style-name="P3">7-6-2026</text:p>
          </table:table-cell>
        </table:table-row>
        <table:table-row>
          <table:table-cell table:style-name="Schedule.A1" office:value-type="string">
            <text:p text:style-name="P3">The interesting part</text:p>
          </table:table-cell>
          <table:table-cell table:style-name="Schedule.A1" office:value-type="string">
            <text:p text:style-name="P3">Implement, test, and document. Doing the actual research.</text:p>
          </table:table-cell>
          <table:table-cell table:style-name="Schedule.A1" office:value-type="string">
            <text:p text:style-name="P3">1-7-2026</text:p>
          </table:table-cell>
        </table:table-row>
        <table:table-row>
          <table:table-cell table:style-name="Schedule.A1" office:value-type="string">
            <text:p text:style-name="P3">Finalize document</text:p>
          </table:table-cell>
          <table:table-cell table:style-name="Schedule.A1" office:value-type="string">
            <text:p text:style-name="P3">Ensure that everything is as it should be</text:p>
          </table:table-cell>
          <table:table-cell table:style-name="Schedule.A1" office:value-type="string">
            <text:p text:style-name="P3">14-7-2026</text:p>
          </table:table-cell>
        </table:table-row>
        <table:table-row>
          <table:table-cell table:style-name="Schedule.A1" office:value-type="string">
            <text:p text:style-name="P4">Realization</text:p>
          </table:table-cell>
          <table:table-cell table:style-name="Schedule.A1" office:value-type="string">
            <text:p text:style-name="P4"><text:span text:style-name="T2">Sudden but planned realization that s</text:span>omething went wrong.</text:p>
          </table:table-cell>
          <table:table-cell table:style-name="Schedule.A1" office:value-type="string">
            <text:p text:style-name="P4">15-7-2026</text:p>
          </table:table-cell>
        </table:table-row>
        <table:table-row>
          <table:table-cell table:style-name="Schedule.A1" office:value-type="string">
            <text:p text:style-name="P4">Recover</text:p>
          </table:table-cell>
          <table:table-cell table:style-name="Schedule.A1" office:value-type="string">
            <text:p text:style-name="P4">Fix everything <text:span text:style-name="T3">in a</text:span> panic <text:span text:style-name="T3">and summer heat.</text:span></text:p>
          </table:table-cell>
          <table:table-cell table:style-name="Schedule.A1" office:value-type="string">
            <text:p text:style-name="P4">31-7-2026</text:p>
          </table:table-cell>
        </table:table-row>
        <table:table-row>
          <table:table-cell table:style-name="Schedule.A1" office:value-type="string">
            <text:p text:style-name="P4">The meeting </text:p>
          </table:table-cell>
          <table:table-cell table:style-name="Schedule.A1" office:value-type="string">
            <text:p text:style-name="P4">Present everything done during summer to the guide</text:p>
          </table:table-cell>
          <table:table-cell table:style-name="Schedule.A1" office:value-type="string">
            <text:p text:style-name="P4">??-8-2026</text:p>
          </table:table-cell>
        </table:table-row>
        <table:table-row>
          <table:table-cell table:style-name="Schedule.A1" office:value-type="string">
            <text:p text:style-name="P4">Redo</text:p>
          </table:table-cell>
          <table:table-cell table:style-name="Schedule.A1" office:value-type="string">
            <text:p text:style-name="P4">Lets redo this. Once more with feeling.</text:p>
          </table:table-cell>
          <table:table-cell table:style-name="Schedule.A1" office:value-type="string">
            <text:p text:style-name="P4">1-10-2026</text:p>
          </table:table-cell>
        </table:table-row>
        <table:table-row>
          <table:table-cell table:style-name="Schedule.A1" office:value-type="string">
            <text:p text:style-name="P4">Done</text:p>
          </table:table-cell>
          <table:table-cell table:style-name="Schedule.A1" office:value-type="string">
            <text:p text:style-name="P4">Finished, ready to be evaluated</text:p>
          </table:table-cell>
          <table:table-cell table:style-name="Schedule.A1" office:value-type="string">
            <text:p text:style-name="P4">1-12-2026</text:p>
          </table:table-cell>
        </table:table-row>
        <table:table-row table:style-name="Schedule.12">
          <table:table-cell table:style-name="Schedule.A1" office:value-type="string">
            <text:p text:style-name="P4">Graduate</text:p>
          </table:table-cell>
          <table:table-cell table:style-name="Schedule.A1" office:value-type="string">
            <text:p text:style-name="P4">I have did done it. I have become the software engineer <text:span text:style-name="T2">in a 4,5 years</text:span>.</text:p>
          </table:table-cell>
          <table:table-cell table:style-name="Schedule.A1" office:value-type="string">
            <text:p text:style-name="P4">6-1-2027</text:p>
          </table:table-cell>
        </table:table-row>
        <table:table-row table:style-name="Schedule.12">
          <table:table-cell table:style-name="Schedule.A1" office:value-type="string">
            <text:p text:style-name="P4">Kela money stops</text:p>
          </table:table-cell>
          <table:table-cell table:style-name="Schedule.A1" office:value-type="string">
            <text:p text:style-name="P4">Kela does pay no more. <text:span text:style-name="T2">If the progress goes here, the situation just escalated to an awful level.</text:span></text:p>
          </table:table-cell>
          <table:table-cell table:style-name="Schedule.A1" office:value-type="string">
            <text:p text:style-name="P4">1-3-2027</text:p>
          </table:table-cell>
        </table:table-row>
        <table:table-row table:style-name="Schedule.14">
          <table:table-cell table:style-name="Schedule.A1" office:value-type="string">
            <text:p text:style-name="P4">“<text:span text:style-name="T5">Life happens</text:span>”</text:p>
          </table:table-cell>
          <table:table-cell table:style-name="Schedule.A1" office:value-type="string">
            <text:p text:style-name="P4">If everything falls apart, this is my absolute last deadline. This is the last plan that should<text:span text:style-name="T6"> NOT </text:span>happen.</text:p>
          </table:table-cell>
          <table:table-cell table:style-name="Schedule.A1" office:value-type="string">
            <text:p text:style-name="P4">1-6-2027</text:p>
          </table:table-cell>
        </table:table-row>
      </table:table>
      <text:p text:style-name="P2"/>
      <text:p text:style-name="P6">The plan has been set. The path is lit. Now I only require the strength to follow it.</text:p>
      <text:p text:style-name="P7">Related Works:</text:p>
      <text:p text:style-name="P8"/>
      <text:p text:style-name="P9"><text:span text:style-name="T7">April 2, 2026, Lahiri Anusuya made an article about Alphabet Inc. Google Deepmind’s new LLM models with family name Gemma 4. They are so efficient that they can be run on directly on user’s own device. The models support more than 140 languages and due to its capability to be run on user’s device, multi-step planning and autonomous actions are possible. <text:s/></text:span><text:reference-mark-start text:name="ZOTERO_ITEM CSL_CITATION {&quot;citationID&quot;:&quot;wSMGBX4b&quot;,&quot;properties&quot;:{&quot;unsorted&quot;:false,&quot;formattedCitation&quot;:&quot;(Lahiri, 2026)&quot;,&quot;plainCitation&quot;:&quot;(Lahiri, 2026)&quot;,&quot;noteIndex&quot;:0},&quot;citationItems&quot;:[{&quot;id&quot;:2,&quot;uris&quot;:[&quot;http://zotero.org/users/local/KOoXlric/items/A5KYG7YC&quot;],&quot;itemData&quot;:{&quot;id&quot;:2,&quot;type&quot;:&quot;article-journal&quot;,&quot;container-title&quot;:&quot;Benzinga Newswires; Southfield&quot;,&quot;language&quot;:&quot;en&quot;,&quot;publisher&quot;:&quot;Accretive Capital LLC d/b/a Benzinga.&quot;,&quot;publisher-place&quot;:&quot;Southfield&quot;,&quot;source&quot;:&quot;Zotero&quot;,&quot;title&quot;:&quot;Google's Gemma 4 Brings AI Superpowers To Your Device&quot;,&quot;URL&quot;:&quot;https://ezproxy.cc.lut.fi/wire-feeds/googles-gemma-4-brings-ai-superpowers-your-device/docview/3324636798/se-2?accountid=27292&quot;,&quot;author&quot;:[{&quot;family&quot;:&quot;Lahiri&quot;,&quot;given&quot;:&quot;Anusuya&quot;}],&quot;accessed&quot;:{&quot;date-parts&quot;:[[&quot;2026&quot;,5,25]]},&quot;issued&quot;:{&quot;date-parts&quot;:[[&quot;2026&quot;]]}}}],&quot;schema&quot;:&quot;https://github.com/citation-style-language/schema/raw/master/csl-citation.json&quot;} RNDcpgOWR8m86"/><text:span text:style-name="T7">(Lahiri, 2026)</text:span><text:reference-mark-end text:name="ZOTERO_ITEM CSL_CITATION {&quot;citationID&quot;:&quot;wSMGBX4b&quot;,&quot;properties&quot;:{&quot;unsorted&quot;:false,&quot;formattedCitation&quot;:&quot;(Lahiri, 2026)&quot;,&quot;plainCitation&quot;:&quot;(Lahiri, 2026)&quot;,&quot;noteIndex&quot;:0},&quot;citationItems&quot;:[{&quot;id&quot;:2,&quot;uris&quot;:[&quot;http://zotero.org/users/local/KOoXlric/items/A5KYG7YC&quot;],&quot;itemData&quot;:{&quot;id&quot;:2,&quot;type&quot;:&quot;article-journal&quot;,&quot;container-title&quot;:&quot;Benzinga Newswires; Southfield&quot;,&quot;language&quot;:&quot;en&quot;,&quot;publisher&quot;:&quot;Accretive Capital LLC d/b/a Benzinga.&quot;,&quot;publisher-place&quot;:&quot;Southfield&quot;,&quot;source&quot;:&quot;Zotero&quot;,&quot;title&quot;:&quot;Google's Gemma 4 Brings AI Superpowers To Your Device&quot;,&quot;URL&quot;:&quot;https://ezproxy.cc.lut.fi/wire-feeds/googles-gemma-4-brings-ai-superpowers-your-device/docview/3324636798/se-2?accountid=27292&quot;,&quot;author&quot;:[{&quot;family&quot;:&quot;Lahiri&quot;,&quot;given&quot;:&quot;Anusuya&quot;}],&quot;accessed&quot;:{&quot;date-parts&quot;:[[&quot;2026&quot;,5,25]]},&quot;issued&quot;:{&quot;date-parts&quot;:[[&quot;2026&quot;]]}}}],&quot;schema&quot;:&quot;https://github.com/citation-style-language/schema/raw/master/csl-citation.json&quot;} RNDcpgOWR8m86"/></text:p>
      <text:p text:style-name="P10"/>
      <text:p text:style-name="P11"><text:span text:style-name="T8">A research called “</text:span><text:span text:style-name="T9">TurboQuant: Online Vector Quantization with Near-optimal Distortion Rate</text:span><text:span text:style-name="T10">”</text:span><text:span text:style-name="T8">, introduces a methodology to Vector Quantization </text:span><text:span text:style-name="T11">which aims to compress high dimensional vectors</text:span><text:span text:style-name="T8">. </text:span><text:span text:style-name="T11">Problem with compression usually is the loss of data but this research claims that their TurboQuant methodology is major improvement to preserving important vector data while compressing. The research</text:span><text:span text:style-name="T8"> provides </text:span><text:span text:style-name="T11">formal</text:span><text:span text:style-name="T8"> proof </text:span><text:span text:style-name="T11">that TurboQuant is close to the best information-theoretically achievable distortion rate which a Vector Quantizer could do.</text:span><text:span text:style-name="T8"> </text:span><text:reference-mark-start text:name="ZOTERO_ITEM CSL_CITATION {&quot;citationID&quot;:&quot;giwrEpBv&quot;,&quot;properties&quot;:{&quot;unsorted&quot;:false,&quot;formattedCitation&quot;:&quot;(Zandieh {\\i{}et al.}, 2025)&quot;,&quot;plainCitation&quot;:&quot;(Zandieh et al., 2025)&quot;,&quot;noteIndex&quot;:0},&quot;citationItems&quot;:[{&quot;id&quot;:6,&quot;uris&quot;:[&quot;http://zotero.org/users/local/KOoXlric/items/7Z22IM2I&quot;],&quot;itemData&quot;:{&quot;id&quot;:6,&quot;type&quot;:&quot;article&quot;,&quot;abstract&quot;:&quot;Vector quantization, a problem rooted in Shannon’s source coding theory, aims to quantize high-dimensional Euclidean vectors while minimizing distortion in their geometric structure. We propose TurboQuant to address both mean-squared error (MSE) and inner product distortion, overcoming limitations of existing methods that fail to achieve optimal distortion rates. Our data-oblivious algorithms, suitable for online applications, achieve near-optimal distortion rates (within a small constant factor) across all bit-widths and dimensions. TurboQuant achieves this by randomly rotating input vectors, inducing a concentrated Beta distribution on coordinates, and leveraging the near-independence property of distinct coordinates in high dimensions to simply apply optimal scalar quantizers per each coordinate. Recognizing that MSE-optimal quantizers introduce bias in inner product estimation, we propose a two-stage approach: applying an MSE quantizer followed by a 1-bit Quantized JL (QJL) transform on the residual, resulting in an unbiased inner product quantizer. We also provide a formal proof of the information-theoretic lower bounds on best achievable distortion rate by any vector quantizer, demonstrating that TurboQuant closely matches these bounds, differing only by a small constant (≈ 2.7) factor. Experimental results validate our theoretical findings, showing that for KV cache quantization, we achieve absolute quality neutrality with 3.5 bits per channel and marginal quality degradation with 2.5 bits per channel. Furthermore, in nearest neighbor search tasks, our method outperforms existing product quantization techniques in recall while reducing indexing time to virtually zero.&quot;,&quot;DOI&quot;:&quot;10.48550/arXiv.2504.19874&quot;,&quot;language&quot;:&quot;en&quot;,&quot;note&quot;:&quot;arXiv:2504.19874 [cs.LG]&quot;,&quot;number&quot;:&quot;arXiv:2504.19874&quot;,&quot;publisher&quot;:&quot;arXiv&quot;,&quot;source&quot;:&quot;arXiv.org&quot;,&quot;title&quot;:&quot;TurboQuant: Online Vector Quantization with Near-optimal Distortion Rate&quot;,&quot;title-short&quot;:&quot;TurboQuant&quot;,&quot;URL&quot;:&quot;http://arxiv.org/abs/2504.19874&quot;,&quot;author&quot;:[{&quot;family&quot;:&quot;Zandieh&quot;,&quot;given&quot;:&quot;Amir&quot;},{&quot;family&quot;:&quot;Daliri&quot;,&quot;given&quot;:&quot;Majid&quot;},{&quot;family&quot;:&quot;Hadian&quot;,&quot;given&quot;:&quot;Majid&quot;},{&quot;family&quot;:&quot;Mirrokni&quot;,&quot;given&quot;:&quot;Vahab&quot;}],&quot;accessed&quot;:{&quot;date-parts&quot;:[[&quot;2026&quot;,5,25]]},&quot;issued&quot;:{&quot;date-parts&quot;:[[&quot;2025&quot;,4,28]]}}}],&quot;schema&quot;:&quot;https://github.com/citation-style-language/schema/raw/master/csl-citation.json&quot;} RNDkKsmsbzrS1"/><text:span text:style-name="T12">(Zandieh </text:span><text:span text:style-name="T13">et al.</text:span><text:span text:style-name="T12">, 2025)</text:span><text:reference-mark-end text:name="ZOTERO_ITEM CSL_CITATION {&quot;citationID&quot;:&quot;giwrEpBv&quot;,&quot;properties&quot;:{&quot;unsorted&quot;:false,&quot;formattedCitation&quot;:&quot;(Zandieh {\\i{}et al.}, 2025)&quot;,&quot;plainCitation&quot;:&quot;(Zandieh et al., 2025)&quot;,&quot;noteIndex&quot;:0},&quot;citationItems&quot;:[{&quot;id&quot;:6,&quot;uris&quot;:[&quot;http://zotero.org/users/local/KOoXlric/items/7Z22IM2I&quot;],&quot;itemData&quot;:{&quot;id&quot;:6,&quot;type&quot;:&quot;article&quot;,&quot;abstract&quot;:&quot;Vector quantization, a problem rooted in Shannon’s source coding theory, aims to quantize high-dimensional Euclidean vectors while minimizing distortion in their geometric structure. We propose TurboQuant to address both mean-squared error (MSE) and inner product distortion, overcoming limitations of existing methods that fail to achieve optimal distortion rates. Our data-oblivious algorithms, suitable for online applications, achieve near-optimal distortion rates (within a small constant factor) across all bit-widths and dimensions. TurboQuant achieves this by randomly rotating input vectors, inducing a concentrated Beta distribution on coordinates, and leveraging the near-independence property of distinct coordinates in high dimensions to simply apply optimal scalar quantizers per each coordinate. Recognizing that MSE-optimal quantizers introduce bias in inner product estimation, we propose a two-stage approach: applying an MSE quantizer followed by a 1-bit Quantized JL (QJL) transform on the residual, resulting in an unbiased inner product quantizer. We also provide a formal proof of the information-theoretic lower bounds on best achievable distortion rate by any vector quantizer, demonstrating that TurboQuant closely matches these bounds, differing only by a small constant (≈ 2.7) factor. Experimental results validate our theoretical findings, showing that for KV cache quantization, we achieve absolute quality neutrality with 3.5 bits per channel and marginal quality degradation with 2.5 bits per channel. Furthermore, in nearest neighbor search tasks, our method outperforms existing product quantization techniques in recall while reducing indexing time to virtually zero.&quot;,&quot;DOI&quot;:&quot;10.48550/arXiv.2504.19874&quot;,&quot;language&quot;:&quot;en&quot;,&quot;note&quot;:&quot;arXiv:2504.19874 [cs.LG]&quot;,&quot;number&quot;:&quot;arXiv:2504.19874&quot;,&quot;publisher&quot;:&quot;arXiv&quot;,&quot;source&quot;:&quot;arXiv.org&quot;,&quot;title&quot;:&quot;TurboQuant: Online Vector Quantization with Near-optimal Distortion Rate&quot;,&quot;title-short&quot;:&quot;TurboQuant&quot;,&quot;URL&quot;:&quot;http://arxiv.org/abs/2504.19874&quot;,&quot;author&quot;:[{&quot;family&quot;:&quot;Zandieh&quot;,&quot;given&quot;:&quot;Amir&quot;},{&quot;family&quot;:&quot;Daliri&quot;,&quot;given&quot;:&quot;Majid&quot;},{&quot;family&quot;:&quot;Hadian&quot;,&quot;given&quot;:&quot;Majid&quot;},{&quot;family&quot;:&quot;Mirrokni&quot;,&quot;given&quot;:&quot;Vahab&quot;}],&quot;accessed&quot;:{&quot;date-parts&quot;:[[&quot;2026&quot;,5,25]]},&quot;issued&quot;:{&quot;date-parts&quot;:[[&quot;2025&quot;,4,28]]}}}],&quot;schema&quot;:&quot;https://github.com/citation-style-language/schema/raw/master/csl-citation.json&quot;} RNDkKsmsbzrS1"/></text:p>
      <text:p text:style-name="P10"/>
      <text:p text:style-name="P12">This research called “<text:span text:style-name="T5">Development of Two Dimension (2D) Game Engine with Finite</text:span></text:p>
      <text:p text:style-name="P13"><text:span text:style-name="T14">State Machine (FSM) Based Artificial Intelligence (AI) Subsystem</text:span><text:span text:style-name="T15">” made a </text:span><text:span text:style-name="T16">web-based JavaScript and WebGL 2.0. </text:span><text:span text:style-name="T15">game engine that had implemented FSM </text:span><text:span text:style-name="T17">AI </text:span><text:span text:style-name="T15">system to run behaviors. </text:span><text:span text:style-name="T16">Vector based AI was just calculating distance from player and changing behavior based of that. FMS-based used FMS to implement behavior.</text:span><text:span text:style-name="T15"> </text:span><text:span text:style-name="T17">The conclusion of this study was that FMS-based AIs can be used and performed 16.667% better than vector based AIs since FMS-based </text:span><text:span text:style-name="T16">calculated only relevant logic while vector based calculated everything</text:span><text:span text:style-name="T17">. </text:span><text:reference-mark-start text:name="ZOTERO_ITEM CSL_CITATION {&quot;citationID&quot;:&quot;ek5YGAev&quot;,&quot;properties&quot;:{&quot;unsorted&quot;:false,&quot;formattedCitation&quot;:&quot;(Adeniyi {\\i{}et al.}, 2024)&quot;,&quot;plainCitation&quot;:&quot;(Adeniyi et al., 2024)&quot;,&quot;noteIndex&quot;:0},&quot;citationItems&quot;:[{&quot;id&quot;:9,&quot;uris&quot;:[&quot;http://zotero.org/users/local/KOoXlric/items/WE6T7F53&quot;],&quot;itemData&quot;:{&quot;id&quot;:9,&quot;type&quot;:&quot;article-journal&quot;,&quot;abstract&quot;:&quot;With Al becoming more and more relevant in today’s world, this project aims to develop a 2D game engine with an Al subsystem for state-driven agents, which is rarely implemented by a lot of 2D engines out there. In this study, a 2D game engine was designed with an FSM (Finite State Machine)--based AL subsystem using state-driven game agents. The engine was implemented using the Javascript programming language and the WebGL 2.0 graphics library/API. It is targeted at web-based games/simulations. Components and subsystems include physics, audio, math, rendering, and AI (based on finite-state machines). The FSM-based AI subsystem is a solution aimed at reducing the ambiguity and performance hits associated with creating 2D game AI in the naive approach. The AI subsystem creates an interface for 2D games to be created with a common paradigm, and simulated with a great level of realism. The state machine used in this study is used to represent a variety of behaviours, such as wandering, attacking, and fleeing. The following conclusions were drawn as regards the impact of the AI approach used on rendering performance; the naive approach to implementing game AI is also compared with the FSM approach in terms of rendering (frames per second/ FPS, or frame rate). With the naive approach (vector math) being used to implement AI, there was a drop in the rendering frame rate to 50 FPS. The FSM approach didn’t affect the frame rate, which is usually at 60FPS. With a well-developed FSM (Finite State Machine), game agents can transition between states easily as a response to user input or stimulus from the game environment. The proposed method was tested by creating a prototype game with the 2D game engine. The prototype game was a straightforward side-scrolling platformer featuring a cast of non-player characters (NPCs). This approach to implementing 2D game AI goes a long way toward improving performance and mitigating ambiguity in the code.&quot;,&quot;container-title&quot;:&quot;Procedia Computer Science&quot;,&quot;DOI&quot;:&quot;10.1016/j.procs.2024.04.283&quot;,&quot;ISSN&quot;:&quot;18770509&quot;,&quot;journalAbbreviation&quot;:&quot;Procedia Computer Science&quot;,&quot;language&quot;:&quot;en&quot;,&quot;page&quot;:&quot;2996-3006&quot;,&quot;source&quot;:&quot;DOI.org (Crossref)&quot;,&quot;title&quot;:&quot;Development of Two Dimension (2D) Game Engine with Finite State Machine (FSM) Based Artificial Intelligence (AI) Subsystem&quot;,&quot;volume&quot;:&quot;235&quot;,&quot;author&quot;:[{&quot;family&quot;:&quot;Adeniyi&quot;,&quot;given&quot;:&quot;Abidemi Emmanuel&quot;},{&quot;family&quot;:&quot;Brahma&quot;,&quot;given&quot;:&quot;Biswajit&quot;},{&quot;family&quot;:&quot;Adebiyi&quot;,&quot;given&quot;:&quot;Marion Olubunmi&quot;},{&quot;family&quot;:&quot;Awotunde&quot;,&quot;given&quot;:&quot;Joseph Bamidele&quot;},{&quot;family&quot;:&quot;Jimoh&quot;,&quot;given&quot;:&quot;Rasheed Gbenga&quot;},{&quot;family&quot;:&quot;Olasinde&quot;,&quot;given&quot;:&quot;Enoch&quot;},{&quot;family&quot;:&quot;Bandyopadhyay&quot;,&quot;given&quot;:&quot;Anjan&quot;}],&quot;issued&quot;:{&quot;date-parts&quot;:[[&quot;2024&quot;]]}}}],&quot;schema&quot;:&quot;https://github.com/citation-style-language/schema/raw/master/csl-citation.json&quot;} RNDZro8mQLzOp"/><text:span text:style-name="T12">(Adeniyi </text:span><text:span text:style-name="T13">et al.</text:span><text:span text:style-name="T12">, 2024)</text:span><text:reference-mark-end text:name="ZOTERO_ITEM CSL_CITATION {&quot;citationID&quot;:&quot;ek5YGAev&quot;,&quot;properties&quot;:{&quot;unsorted&quot;:false,&quot;formattedCitation&quot;:&quot;(Adeniyi {\\i{}et al.}, 2024)&quot;,&quot;plainCitation&quot;:&quot;(Adeniyi et al., 2024)&quot;,&quot;noteIndex&quot;:0},&quot;citationItems&quot;:[{&quot;id&quot;:9,&quot;uris&quot;:[&quot;http://zotero.org/users/local/KOoXlric/items/WE6T7F53&quot;],&quot;itemData&quot;:{&quot;id&quot;:9,&quot;type&quot;:&quot;article-journal&quot;,&quot;abstract&quot;:&quot;With Al becoming more and more relevant in today’s world, this project aims to develop a 2D game engine with an Al subsystem for state-driven agents, which is rarely implemented by a lot of 2D engines out there. In this study, a 2D game engine was designed with an FSM (Finite State Machine)--based AL subsystem using state-driven game agents. The engine was implemented using the Javascript programming language and the WebGL 2.0 graphics library/API. It is targeted at web-based games/simulations. Components and subsystems include physics, audio, math, rendering, and AI (based on finite-state machines). The FSM-based AI subsystem is a solution aimed at reducing the ambiguity and performance hits associated with creating 2D game AI in the naive approach. The AI subsystem creates an interface for 2D games to be created with a common paradigm, and simulated with a great level of realism. The state machine used in this study is used to represent a variety of behaviours, such as wandering, attacking, and fleeing. The following conclusions were drawn as regards the impact of the AI approach used on rendering performance; the naive approach to implementing game AI is also compared with the FSM approach in terms of rendering (frames per second/ FPS, or frame rate). With the naive approach (vector math) being used to implement AI, there was a drop in the rendering frame rate to 50 FPS. The FSM approach didn’t affect the frame rate, which is usually at 60FPS. With a well-developed FSM (Finite State Machine), game agents can transition between states easily as a response to user input or stimulus from the game environment. The proposed method was tested by creating a prototype game with the 2D game engine. The prototype game was a straightforward side-scrolling platformer featuring a cast of non-player characters (NPCs). This approach to implementing 2D game AI goes a long way toward improving performance and mitigating ambiguity in the code.&quot;,&quot;container-title&quot;:&quot;Procedia Computer Science&quot;,&quot;DOI&quot;:&quot;10.1016/j.procs.2024.04.283&quot;,&quot;ISSN&quot;:&quot;18770509&quot;,&quot;journalAbbreviation&quot;:&quot;Procedia Computer Science&quot;,&quot;language&quot;:&quot;en&quot;,&quot;page&quot;:&quot;2996-3006&quot;,&quot;source&quot;:&quot;DOI.org (Crossref)&quot;,&quot;title&quot;:&quot;Development of Two Dimension (2D) Game Engine with Finite State Machine (FSM) Based Artificial Intelligence (AI) Subsystem&quot;,&quot;volume&quot;:&quot;235&quot;,&quot;author&quot;:[{&quot;family&quot;:&quot;Adeniyi&quot;,&quot;given&quot;:&quot;Abidemi Emmanuel&quot;},{&quot;family&quot;:&quot;Brahma&quot;,&quot;given&quot;:&quot;Biswajit&quot;},{&quot;family&quot;:&quot;Adebiyi&quot;,&quot;given&quot;:&quot;Marion Olubunmi&quot;},{&quot;family&quot;:&quot;Awotunde&quot;,&quot;given&quot;:&quot;Joseph Bamidele&quot;},{&quot;family&quot;:&quot;Jimoh&quot;,&quot;given&quot;:&quot;Rasheed Gbenga&quot;},{&quot;family&quot;:&quot;Olasinde&quot;,&quot;given&quot;:&quot;Enoch&quot;},{&quot;family&quot;:&quot;Bandyopadhyay&quot;,&quot;given&quot;:&quot;Anjan&quot;}],&quot;issued&quot;:{&quot;date-parts&quot;:[[&quot;2024&quot;]]}}}],&quot;schema&quot;:&quot;https://github.com/citation-style-language/schema/raw/master/csl-citation.json&quot;} RNDZro8mQLzOp"/></text:p>
      <text:p text:style-name="P14"/>
      <text:p text:style-name="P14">References:</text:p>
      <text:section text:style-name="Sect1" text:name="ZOTERO_BIBL {&quot;uncited&quot;:[],&quot;omitted&quot;:[],&quot;custom&quot;:[]} CSL_BIBLIOGRAPHY RNDClp9MM68z7">
        <text:p text:style-name="Bibliography_20_1">Adeniyi, A.E. <text:span text:style-name="T18">et al.</text:span> (2024) ‘Development of Two Dimension (2D) Game Engine with Finite State Machine (FSM) Based Artificial Intelligence (AI) Subsystem’, <text:span text:style-name="T18">Procedia Computer Science</text:span>, 235, pp. 2996–3006. Available at: https://doi.org/10.1016/j.procs.2024.04.283.</text:p>
        <text:p text:style-name="Bibliography_20_1">Lahiri, A. (2026) ‘Google’s Gemma 4 Brings AI Superpowers To Your Device’, <text:span text:style-name="T18">Benzinga Newswires; Southfield</text:span> [Preprint]. Available at: https://ezproxy.cc.lut.fi/wire-feeds/googles-gemma-4-brings-ai-superpowers-your-device/docview/3324636798/se-2?accountid=27292 (Accessed: 25 May 2026).</text:p>
        <text:p text:style-name="Bibliography_20_1">Zandieh, A. <text:span text:style-name="T18">et al.</text:span> (2025) ‘TurboQuant: Online Vector Quantization with Near-optimal Distortion Rate’. arXiv. Available at: https://doi.org/10.48550/arXiv.2504.19874.</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in" fo:margin-top="0in" fo:margin-bottom="0.1665in" style:contextual-spacing="false" style:line-height-at-least="0.1665in" fo:text-indent="0in" style:auto-text-indent="false">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5T08:52:41.600435700</meta:creation-date>
    <dc:date>2026-05-25T16:43:11.701937500</dc:date>
    <meta:editing-duration>PT38M22S</meta:editing-duration>
    <meta:editing-cycles>5</meta:editing-cycles>
    <meta:generator>LibreOffice/25.8.6.2$Windows_X86_64 LibreOffice_project/b4b39682cd9868fa725bc664aff94278d315bd04</meta:generator>
    <meta:print-date>2026-05-25T16:43:19.163838300</meta:print-date>
    <meta:printed-by>PDF files</meta:printed-by>
    <meta:document-statistic meta:table-count="1" meta:image-count="0" meta:object-count="0" meta:page-count="2" meta:paragraph-count="66" meta:word-count="659" meta:character-count="4381" meta:non-whitespace-character-count="3787"/>
    <meta:user-defined meta:name="ZOTERO_PREF_1">&lt;data data-version="3" zotero-version="9.0.4"&gt;&lt;session id="AQspjwMr"/&gt;&lt;style id="http://www.zotero.org/styles/oxford-brookes-university-harvard" hasBibliography="1" bibliographyStyleHasBeenSet="1"/&gt;&lt;prefs&gt;&lt;pref name="fieldType" value="ReferenceMark"/&gt;&lt;/pr</meta:user-defined>
    <meta:user-defined meta:name="ZOTERO_PREF_2">efs&gt;&lt;/data&gt;</meta:user-defined>
  </office:meta>
</office:document-meta>
</file>