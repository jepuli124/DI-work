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Schedule" style:family="table">
      <style:table-properties style:width="6.6931in" table:align="margins"/>
    </style:style>
    <style:style style:name="Schedule.A" style:family="table-column">
      <style:table-column-properties style:column-width="1.4361in" style:rel-column-width="14065*"/>
    </style:style>
    <style:style style:name="Schedule.B" style:family="table-column">
      <style:table-column-properties style:column-width="3.0222in" style:rel-column-width="29590*"/>
    </style:style>
    <style:style style:name="Schedule.C" style:family="table-column">
      <style:table-column-properties style:column-width="2.2347in" style:rel-column-width="21880*"/>
    </style:style>
    <style:style style:name="Schedule.A1" style:family="table-cell">
      <style:table-cell-properties fo:padding="0in" fo:border="none" style:writing-mode="page"/>
    </style:style>
    <style:style style:name="Schedule.2" style:family="table-row">
      <style:table-row-properties style:min-row-height="0.3708in"/>
    </style:style>
    <style:style style:name="Schedule.13" style:family="table-row">
      <style:table-row-properties style:min-row-height="0.2625in"/>
    </style:style>
    <style:style style:name="Schedule.15" style:family="table-row">
      <style:table-row-properties style:min-row-height="0.8042in"/>
    </style:style>
    <style:style style:name="P1" style:family="paragraph" style:parent-style-name="Standard">
      <style:text-properties officeooo:rsid="001c5006" officeooo:paragraph-rsid="001bb7db"/>
    </style:style>
    <style:style style:name="P2" style:family="paragraph" style:parent-style-name="Standard">
      <style:text-properties officeooo:rsid="001c5006" officeooo:paragraph-rsid="001af719"/>
    </style:style>
    <style:style style:name="P3" style:family="paragraph" style:parent-style-name="Standard">
      <style:text-properties officeooo:rsid="001d5eec" officeooo:paragraph-rsid="001d5eec"/>
    </style:style>
    <style:style style:name="P4" style:family="paragraph" style:parent-style-name="Standard">
      <style:text-properties officeooo:rsid="001dc910" officeooo:paragraph-rsid="001af719"/>
    </style:style>
    <style:style style:name="P5" style:family="paragraph" style:parent-style-name="Table_20_Contents">
      <style:text-properties officeooo:rsid="001dc910" officeooo:paragraph-rsid="001af719"/>
    </style:style>
    <style:style style:name="P6" style:family="paragraph" style:parent-style-name="Table_20_Contents">
      <style:text-properties officeooo:rsid="001f0119" officeooo:paragraph-rsid="001af719"/>
    </style:style>
    <style:style style:name="P7" style:family="paragraph" style:parent-style-name="Table_20_Contents">
      <style:text-properties officeooo:rsid="001af719" officeooo:paragraph-rsid="001af719"/>
    </style:style>
    <style:style style:name="P8" style:family="paragraph" style:parent-style-name="Standard">
      <style:text-properties fo:font-style="italic" officeooo:rsid="00210986" officeooo:paragraph-rsid="001af719" style:font-style-asian="italic" style:font-style-complex="italic"/>
    </style:style>
    <style:style style:name="P9" style:family="paragraph" style:parent-style-name="Standard">
      <style:paragraph-properties fo:break-before="page"/>
      <style:text-properties fo:font-style="normal" officeooo:rsid="001af719" officeooo:paragraph-rsid="001af719" style:font-style-asian="normal" style:font-style-complex="normal"/>
    </style:style>
    <style:style style:name="P10" style:family="paragraph" style:parent-style-name="Standard">
      <style:text-properties fo:font-style="normal" officeooo:rsid="001af719" officeooo:paragraph-rsid="001af719" style:font-style-asian="normal" style:font-style-complex="normal"/>
    </style:style>
    <style:style style:name="P11" style:family="paragraph" style:parent-style-name="Standard">
      <style:text-properties officeooo:paragraph-rsid="001bb7db"/>
    </style:style>
    <style:style style:name="P12" style:family="paragraph" style:parent-style-name="Standard">
      <style:text-properties fo:font-variant="normal" fo:text-transform="none" style:text-underline-style="none" fo:font-weight="normal" officeooo:paragraph-rsid="001bb7db"/>
    </style:style>
    <style:style style:name="P13" style:family="paragraph" style:parent-style-name="Standard">
      <style:text-properties officeooo:paragraph-rsid="001e5281"/>
    </style:style>
    <style:style style:name="P14" style:family="paragraph" style:parent-style-name="Standard">
      <style:text-properties fo:font-variant="normal" fo:text-transform="none" style:text-underline-style="none" fo:font-weight="normal" officeooo:rsid="001bb7db" officeooo:paragraph-rsid="001bb7db"/>
    </style:style>
    <style:style style:name="T1" style:family="text">
      <style:text-properties officeooo:rsid="001bb7db"/>
    </style:style>
    <style:style style:name="T2" style:family="text">
      <style:text-properties officeooo:rsid="001af719"/>
    </style:style>
    <style:style style:name="T3" style:family="text">
      <style:text-properties officeooo:rsid="001dc910"/>
    </style:style>
    <style:style style:name="T4" style:family="text">
      <style:text-properties officeooo:rsid="001d5eec"/>
    </style:style>
    <style:style style:name="T5" style:family="text">
      <style:text-properties officeooo:rsid="001f0119"/>
    </style:style>
    <style:style style:name="T6" style:family="text">
      <style:text-properties officeooo:rsid="001f35a7"/>
    </style:style>
    <style:style style:name="T7" style:family="text">
      <style:text-properties officeooo:rsid="001f1613"/>
    </style:style>
    <style:style style:name="T8" style:family="text">
      <style:text-properties officeooo:rsid="001c8510"/>
    </style:style>
    <style:style style:name="T9" style:family="text">
      <style:text-properties fo:font-style="italic" style:font-style-asian="italic" style:font-style-complex="italic"/>
    </style:style>
    <style:style style:name="T10" style:family="text">
      <style:text-properties fo:font-weight="bold" style:font-weight-asian="bold" style:font-weight-complex="bold"/>
    </style:style>
    <style:style style:name="T11" style:family="text">
      <style:text-properties officeooo:rsid="002a9069"/>
    </style:style>
    <style:style style:name="T12" style:family="text">
      <style:text-properties fo:font-style="italic" officeooo:rsid="002a9069" style:font-style-asian="italic" style:font-style-complex="italic"/>
    </style:style>
    <style:style style:name="T13" style:family="text">
      <style:text-properties officeooo:rsid="002bf4b2"/>
    </style:style>
    <style:style style:name="T14" style:family="text">
      <style:text-properties fo:font-variant="normal" fo:text-transform="none" style:text-position="0% 100%" style:text-underline-style="none" fo:font-weight="normal"/>
    </style:style>
    <style:style style:name="T15" style:family="text">
      <style:text-properties fo:font-variant="normal" fo:text-transform="none" style:text-position="0% 100%" fo:font-style="italic" style:text-underline-style="none" fo:font-weight="normal" style:font-style-asian="italic"/>
    </style:style>
    <style:style style:name="T16" style:family="text">
      <style:text-properties fo:font-variant="normal" fo:text-transform="none" style:text-underline-style="none" fo:font-weight="normal" officeooo:rsid="001d5eec"/>
    </style:style>
    <style:style style:name="T17" style:family="text">
      <style:text-properties fo:font-variant="normal" fo:text-transform="none" fo:font-style="italic" style:text-underline-style="none" fo:font-weight="normal" officeooo:rsid="001d5eec" style:font-style-asian="italic"/>
    </style:style>
    <style:style style:name="T18" style:family="text">
      <style:text-properties fo:font-variant="normal" fo:text-transform="none" fo:font-style="normal" style:text-underline-style="none" fo:font-weight="normal" officeooo:rsid="001d5eec" style:font-style-asian="normal" style:font-style-complex="normal"/>
    </style:style>
    <style:style style:name="T19" style:family="text">
      <style:text-properties fo:font-variant="normal" fo:text-transform="none" style:text-underline-style="none" fo:font-weight="normal" officeooo:rsid="001e5281"/>
    </style:style>
    <style:style style:name="T20" style:family="text">
      <style:text-properties fo:font-variant="normal" fo:text-transform="none" fo:font-style="italic" style:text-underline-style="none" fo:font-weight="normal" officeooo:rsid="001e5281" style:font-style-asian="italic"/>
    </style:style>
    <style:style style:name="T21" style:family="text">
      <style:text-properties fo:font-variant="normal" fo:text-transform="none" style:text-underline-style="none" fo:font-weight="normal" officeooo:rsid="001eebed"/>
    </style:style>
    <style:style style:name="T22" style:family="text">
      <style:text-properties fo:font-style="italic" style:font-style-asian="italic"/>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OTE, changes on details are to be expected)</text:span></text:p>
      <text:p text:style-name="P2">Title: <text:span text:style-name="T2">Self-made machine vision with extra steps for Pikwel. </text:span></text:p>
      <text:p text:style-name="P2">Desc.: Making a modul<text:span text:style-name="T1">ar Machine vision AI from somewhat from scratch, then distilling it to acceptable size so it runs on x (to be determined) hardware.</text:span> <text:span text:style-name="T1">End result should be two artifacts: an </text:span>AI’s <text:span text:style-name="T1">that’s</text:span> plug-and-play <text:span text:style-name="T1">and a grant AI that can be used to teach smaller AIs. Also camera system’s effect on the machine vision. Company also wishes to keep some part of the research hidden.</text:span></text:p>
      <text:p text:style-name="P2"/>
      <text:p text:style-name="P3">Methodology: Design science.</text:p>
      <text:p text:style-name="P2"/>
      <text:p text:style-name="P2">Research goals <text:span text:style-name="T1">(to be extended)</text:span>:</text:p>
      <text:p text:style-name="P1">* (Main) Can “<text:span text:style-name="T1">self-made” </text:span>AI system be implemented as plug-and-play <text:span text:style-name="T1">machine vision with modular components</text:span> while allowing them to run on <text:span text:style-name="T1">x (to be determined) hardware</text:span> systems.</text:p>
      <text:p text:style-name="P2">* How much resources must be used while using such AI’s <text:span text:style-name="T3">and how to optimize them.</text:span></text:p>
      <text:p text:style-name="P2">* How <text:span text:style-name="T1">different camera systems affect the AI’s capability to perform</text:span></text:p>
      <text:p text:style-name="P2"/>
      <text:p text:style-name="P4">Tools used:</text:p>
      <text:p text:style-name="P4">* <text:span text:style-name="T2">OpenCV, PyTorch Vision, TensorFlow, Scikit-image (Machine vision and AI libraries)</text:span></text:p>
      <text:p text:style-name="P4">* visual studio code (main coding <text:span text:style-name="T4">tool</text:span>)</text:p>
      <text:p text:style-name="P4">* GitHub (version control)</text:p>
      <text:p text:style-name="P4">* <text:span text:style-name="T2">TurboQuant </text:span><text:span text:style-name="T4">(Vector Quantization)</text:span></text:p>
      <text:p text:style-name="P4"/>
      <text:p text:style-name="P4">Timetable:</text:p>
      <table:table table:name="Schedule" table:style-name="Schedule">
        <table:table-column table:style-name="Schedule.A"/>
        <table:table-column table:style-name="Schedule.B"/>
        <table:table-column table:style-name="Schedule.C"/>
        <table:table-row>
          <table:table-cell table:style-name="Schedule.A1" office:value-type="string">
            <text:p text:style-name="P5">Name</text:p>
          </table:table-cell>
          <table:table-cell table:style-name="Schedule.A1" office:value-type="string">
            <text:p text:style-name="P5">Desc.</text:p>
          </table:table-cell>
          <table:table-cell table:style-name="Schedule.A1" office:value-type="string">
            <text:p text:style-name="P5">Date/<text:span text:style-name="T5">deadline</text:span></text:p>
          </table:table-cell>
        </table:table-row>
        <table:table-row table:style-name="Schedule.2">
          <table:table-cell table:style-name="Schedule.A1" office:value-type="string">
            <text:p text:style-name="P6">Planed</text:p>
          </table:table-cell>
          <table:table-cell table:style-name="Schedule.A1" office:value-type="string">
            <text:p text:style-name="P5">Publish work plan</text:p>
          </table:table-cell>
          <table:table-cell table:style-name="Schedule.A1" office:value-type="string">
            <text:p text:style-name="P5"><text:span text:style-name="T2">2</text:span>-<text:span text:style-name="T2">6</text:span>-2026</text:p>
          </table:table-cell>
        </table:table-row>
        <table:table-row table:style-name="Schedule.2">
          <table:table-cell table:style-name="Schedule.A1" office:value-type="string">
            <text:p text:style-name="P5"><text:span text:style-name="T5">Official </text:span>Start</text:p>
          </table:table-cell>
          <table:table-cell table:style-name="Schedule.A1" office:value-type="string">
            <text:p text:style-name="P6">Lets do this. <text:span text:style-name="T2">On site meeting with Pikwel</text:span></text:p>
          </table:table-cell>
          <table:table-cell table:style-name="Schedule.A1" office:value-type="string">
            <text:p text:style-name="P6">1<text:span text:style-name="T2">0</text:span>-6-2026</text:p>
          </table:table-cell>
        </table:table-row>
        <table:table-row>
          <table:table-cell table:style-name="Schedule.A1" office:value-type="string">
            <text:p text:style-name="P5">Foundation</text:p>
          </table:table-cell>
          <table:table-cell table:style-name="Schedule.A1" office:value-type="string">
            <text:p text:style-name="P5">Write methodology and related research</text:p>
          </table:table-cell>
          <table:table-cell table:style-name="Schedule.A1" office:value-type="string">
            <text:p text:style-name="P5"><text:span text:style-name="T2">20</text:span>-6-2026</text:p>
          </table:table-cell>
        </table:table-row>
        <table:table-row>
          <table:table-cell table:style-name="Schedule.A1" office:value-type="string">
            <text:p text:style-name="P5">The interesting part</text:p>
          </table:table-cell>
          <table:table-cell table:style-name="Schedule.A1" office:value-type="string">
            <text:p text:style-name="P5">Implement, test, and document. Doing the actual research.</text:p>
          </table:table-cell>
          <table:table-cell table:style-name="Schedule.A1" office:value-type="string">
            <text:p text:style-name="P5">1<text:span text:style-name="T2">4</text:span>-7-2026</text:p>
          </table:table-cell>
        </table:table-row>
        <table:table-row>
          <table:table-cell table:style-name="Schedule.A1" office:value-type="string">
            <text:p text:style-name="P5">Finalize document</text:p>
          </table:table-cell>
          <table:table-cell table:style-name="Schedule.A1" office:value-type="string">
            <text:p text:style-name="P5">Ensure that everything is as it should be</text:p>
          </table:table-cell>
          <table:table-cell table:style-name="Schedule.A1" office:value-type="string">
            <text:p text:style-name="P5"><text:span text:style-name="T2">30</text:span>-7-2026</text:p>
          </table:table-cell>
        </table:table-row>
        <table:table-row>
          <table:table-cell table:style-name="Schedule.A1" office:value-type="string">
            <text:p text:style-name="P6">Realization</text:p>
          </table:table-cell>
          <table:table-cell table:style-name="Schedule.A1" office:value-type="string">
            <text:p text:style-name="P6"><text:span text:style-name="T6">Sudden but planned realization that s</text:span>omething went wrong.</text:p>
          </table:table-cell>
          <table:table-cell table:style-name="Schedule.A1" office:value-type="string">
            <text:p text:style-name="P6"><text:span text:style-name="T2">31</text:span>-7-2026</text:p>
          </table:table-cell>
        </table:table-row>
        <table:table-row>
          <table:table-cell table:style-name="Schedule.A1" office:value-type="string">
            <text:p text:style-name="P6">Recover</text:p>
          </table:table-cell>
          <table:table-cell table:style-name="Schedule.A1" office:value-type="string">
            <text:p text:style-name="P6">Fix everything <text:span text:style-name="T7">in a</text:span> panic <text:span text:style-name="T7">and summer heat.</text:span></text:p>
          </table:table-cell>
          <table:table-cell table:style-name="Schedule.A1" office:value-type="string">
            <text:p text:style-name="P6"><text:span text:style-name="T2">14</text:span>-<text:span text:style-name="T2">8</text:span>-2026</text:p>
          </table:table-cell>
        </table:table-row>
        <table:table-row>
          <table:table-cell table:style-name="Schedule.A1" office:value-type="string">
            <text:p text:style-name="P6">The meeting </text:p>
          </table:table-cell>
          <table:table-cell table:style-name="Schedule.A1" office:value-type="string">
            <text:p text:style-name="P6">Present everything done during summer to the guid<text:span text:style-name="T2">ing professor.</text:span></text:p>
          </table:table-cell>
          <table:table-cell table:style-name="Schedule.A1" office:value-type="string">
            <text:p text:style-name="P6">??-8-2026</text:p>
          </table:table-cell>
        </table:table-row>
        <table:table-row>
          <table:table-cell table:style-name="Schedule.A1" office:value-type="string">
            <text:p text:style-name="P7">Salary</text:p>
          </table:table-cell>
          <table:table-cell table:style-name="Schedule.A1" office:value-type="string">
            <text:p text:style-name="P7">The<text:span text:style-name="T8">y</text:span> start to pay salary <text:span text:style-name="T8">for this</text:span></text:p>
          </table:table-cell>
          <table:table-cell table:style-name="Schedule.A1" office:value-type="string">
            <text:p text:style-name="P7">1-9-2026</text:p>
          </table:table-cell>
        </table:table-row>
        <table:table-row>
          <table:table-cell table:style-name="Schedule.A1" office:value-type="string">
            <text:p text:style-name="P6">Redo</text:p>
          </table:table-cell>
          <table:table-cell table:style-name="Schedule.A1" office:value-type="string">
            <text:p text:style-name="P6">Lets redo this. Once more with feeling.</text:p>
          </table:table-cell>
          <table:table-cell table:style-name="Schedule.A1" office:value-type="string">
            <text:p text:style-name="P6">1-10-2026</text:p>
          </table:table-cell>
        </table:table-row>
        <table:table-row>
          <table:table-cell table:style-name="Schedule.A1" office:value-type="string">
            <text:p text:style-name="P6">Done</text:p>
          </table:table-cell>
          <table:table-cell table:style-name="Schedule.A1" office:value-type="string">
            <text:p text:style-name="P6">Finished, ready to be evaluated</text:p>
          </table:table-cell>
          <table:table-cell table:style-name="Schedule.A1" office:value-type="string">
            <text:p text:style-name="P6">1-12-2026</text:p>
          </table:table-cell>
        </table:table-row>
        <table:table-row table:style-name="Schedule.13">
          <table:table-cell table:style-name="Schedule.A1" office:value-type="string">
            <text:p text:style-name="P6">Graduate</text:p>
          </table:table-cell>
          <table:table-cell table:style-name="Schedule.A1" office:value-type="string">
            <text:p text:style-name="P6">I have did done it. I have become the software engineer <text:span text:style-name="T6">in a 4,5 years</text:span>.</text:p>
          </table:table-cell>
          <table:table-cell table:style-name="Schedule.A1" office:value-type="string">
            <text:p text:style-name="P6">6-1-2027</text:p>
          </table:table-cell>
        </table:table-row>
        <table:table-row table:style-name="Schedule.13">
          <table:table-cell table:style-name="Schedule.A1" office:value-type="string">
            <text:p text:style-name="P6">Kela money stops</text:p>
          </table:table-cell>
          <table:table-cell table:style-name="Schedule.A1" office:value-type="string">
            <text:p text:style-name="P6">Kela does pay no more. <text:span text:style-name="T6">If the progress goes here, the situation just escalated to an awful level.</text:span></text:p>
          </table:table-cell>
          <table:table-cell table:style-name="Schedule.A1" office:value-type="string">
            <text:p text:style-name="P6">1-3-2027</text:p>
          </table:table-cell>
        </table:table-row>
        <table:table-row table:style-name="Schedule.15">
          <table:table-cell table:style-name="Schedule.A1" office:value-type="string">
            <text:p text:style-name="P6">“<text:span text:style-name="T9">Life happens</text:span>”</text:p>
          </table:table-cell>
          <table:table-cell table:style-name="Schedule.A1" office:value-type="string">
            <text:p text:style-name="P6">If everything falls apart, this is my absolute last deadline. This is the last plan that should<text:span text:style-name="T10"> NOT </text:span>happen.</text:p>
          </table:table-cell>
          <table:table-cell table:style-name="Schedule.A1" office:value-type="string">
            <text:p text:style-name="P6">1-6-2027</text:p>
          </table:table-cell>
        </table:table-row>
      </table:table>
      <text:p text:style-name="P4"/>
      <text:p text:style-name="P8">The plan has been set. The path is lit. Now I only require the strength to follow it.</text:p>
      <text:p text:style-name="P9">Related Works:</text:p>
      <text:p text:style-name="P10"/>
      <text:p text:style-name="P11"><text:span text:style-name="T11">A research called “</text:span><text:span text:style-name="T12">TurboQuant: Online Vector Quantization with Near-optimal Distortion Rate</text:span><text:span text:style-name="T11">”, introduces a methodology to Vector Quantization </text:span><text:span text:style-name="T13">which aims to compress high dimensional vectors</text:span><text:span text:style-name="T11">. </text:span><text:span text:style-name="T13">Problem with compression usually is the loss of data but this research claims that their TurboQuant methodology is major improvement to preserving important vector data while compressing. The research</text:span><text:span text:style-name="T11"> provides </text:span><text:span text:style-name="T13">formal</text:span><text:span text:style-name="T11"> proof </text:span><text:span text:style-name="T13">that TurboQuant is close to the best information-theoretically achievable distortion rate which a Vector Quantizer could do.</text:span><text:span text:style-name="T11"> </text:span><text:reference-mark-start text:name="ZOTERO_ITEM CSL_CITATION {&quot;citationID&quot;:&quot;giwrEpBv&quot;,&quot;properties&quot;:{&quot;unsorted&quot;:false,&quot;formattedCitation&quot;:&quot;(Zandieh {\\i{}et al.}, 2025)&quot;,&quot;plainCitation&quot;:&quot;(Zandieh et al., 2025)&quot;,&quot;noteIndex&quot;:0},&quot;citationItems&quot;:[{&quot;id&quot;:6,&quot;uris&quot;:[&quot;http://zotero.org/users/local/KOoXlric/items/7Z22IM2I&quot;],&quot;itemData&quot;:{&quot;id&quot;:6,&quot;type&quot;:&quot;article&quot;,&quot;abstract&quot;:&quot;Vector quantization, a problem rooted in Shannon’s source coding theory, aims to quantize high-dimensional Euclidean vectors while minimizing distortion in their geometric structure. We propose TurboQuant to address both mean-squared error (MSE) and inner product distortion, overcoming limitations of existing methods that fail to achieve optimal distortion rates. Our data-oblivious algorithms, suitable for online applications, achieve near-optimal distortion rates (within a small constant factor) across all bit-widths and dimensions. TurboQuant achieves this by randomly rotating input vectors, inducing a concentrated Beta distribution on coordinates, and leveraging the near-independence property of distinct coordinates in high dimensions to simply apply optimal scalar quantizers per each coordinate. Recognizing that MSE-optimal quantizers introduce bias in inner product estimation, we propose a two-stage approach: applying an MSE quantizer followed by a 1-bit Quantized JL (QJL) transform on the residual, resulting in an unbiased inner product quantizer. We also provide a formal proof of the information-theoretic lower bounds on best achievable distortion rate by any vector quantizer, demonstrating that TurboQuant closely matches these bounds, differing only by a small constant (≈ 2.7) factor. Experimental results validate our theoretical findings, showing that for KV cache quantization, we achieve absolute quality neutrality with 3.5 bits per channel and marginal quality degradation with 2.5 bits per channel. Furthermore, in nearest neighbor search tasks, our method outperforms existing product quantization techniques in recall while reducing indexing time to virtually zero.&quot;,&quot;DOI&quot;:&quot;10.48550/arXiv.2504.19874&quot;,&quot;language&quot;:&quot;en&quot;,&quot;note&quot;:&quot;arXiv:2504.19874 [cs.LG]&quot;,&quot;number&quot;:&quot;arXiv:2504.19874&quot;,&quot;publisher&quot;:&quot;arXiv&quot;,&quot;source&quot;:&quot;arXiv.org&quot;,&quot;title&quot;:&quot;TurboQuant: Online Vector Quantization with Near-optimal Distortion Rate&quot;,&quot;title-short&quot;:&quot;TurboQuant&quot;,&quot;URL&quot;:&quot;http://arxiv.org/abs/2504.19874&quot;,&quot;author&quot;:[{&quot;family&quot;:&quot;Zandieh&quot;,&quot;given&quot;:&quot;Amir&quot;},{&quot;family&quot;:&quot;Daliri&quot;,&quot;given&quot;:&quot;Majid&quot;},{&quot;family&quot;:&quot;Hadian&quot;,&quot;given&quot;:&quot;Majid&quot;},{&quot;family&quot;:&quot;Mirrokni&quot;,&quot;given&quot;:&quot;Vahab&quot;}],&quot;accessed&quot;:{&quot;date-parts&quot;:[[&quot;2026&quot;,5,25]]},&quot;issued&quot;:{&quot;date-parts&quot;:[[&quot;2025&quot;,4,28]]}}}],&quot;schema&quot;:&quot;https://github.com/citation-style-language/schema/raw/master/csl-citation.json&quot;} RNDkKsmsbzrS1"/><text:span text:style-name="T14">(Zandieh </text:span><text:span text:style-name="T15">et al.</text:span><text:span text:style-name="T14">, 2025)</text:span><text:reference-mark-end text:name="ZOTERO_ITEM CSL_CITATION {&quot;citationID&quot;:&quot;giwrEpBv&quot;,&quot;properties&quot;:{&quot;unsorted&quot;:false,&quot;formattedCitation&quot;:&quot;(Zandieh {\\i{}et al.}, 2025)&quot;,&quot;plainCitation&quot;:&quot;(Zandieh et al., 2025)&quot;,&quot;noteIndex&quot;:0},&quot;citationItems&quot;:[{&quot;id&quot;:6,&quot;uris&quot;:[&quot;http://zotero.org/users/local/KOoXlric/items/7Z22IM2I&quot;],&quot;itemData&quot;:{&quot;id&quot;:6,&quot;type&quot;:&quot;article&quot;,&quot;abstract&quot;:&quot;Vector quantization, a problem rooted in Shannon’s source coding theory, aims to quantize high-dimensional Euclidean vectors while minimizing distortion in their geometric structure. We propose TurboQuant to address both mean-squared error (MSE) and inner product distortion, overcoming limitations of existing methods that fail to achieve optimal distortion rates. Our data-oblivious algorithms, suitable for online applications, achieve near-optimal distortion rates (within a small constant factor) across all bit-widths and dimensions. TurboQuant achieves this by randomly rotating input vectors, inducing a concentrated Beta distribution on coordinates, and leveraging the near-independence property of distinct coordinates in high dimensions to simply apply optimal scalar quantizers per each coordinate. Recognizing that MSE-optimal quantizers introduce bias in inner product estimation, we propose a two-stage approach: applying an MSE quantizer followed by a 1-bit Quantized JL (QJL) transform on the residual, resulting in an unbiased inner product quantizer. We also provide a formal proof of the information-theoretic lower bounds on best achievable distortion rate by any vector quantizer, demonstrating that TurboQuant closely matches these bounds, differing only by a small constant (≈ 2.7) factor. Experimental results validate our theoretical findings, showing that for KV cache quantization, we achieve absolute quality neutrality with 3.5 bits per channel and marginal quality degradation with 2.5 bits per channel. Furthermore, in nearest neighbor search tasks, our method outperforms existing product quantization techniques in recall while reducing indexing time to virtually zero.&quot;,&quot;DOI&quot;:&quot;10.48550/arXiv.2504.19874&quot;,&quot;language&quot;:&quot;en&quot;,&quot;note&quot;:&quot;arXiv:2504.19874 [cs.LG]&quot;,&quot;number&quot;:&quot;arXiv:2504.19874&quot;,&quot;publisher&quot;:&quot;arXiv&quot;,&quot;source&quot;:&quot;arXiv.org&quot;,&quot;title&quot;:&quot;TurboQuant: Online Vector Quantization with Near-optimal Distortion Rate&quot;,&quot;title-short&quot;:&quot;TurboQuant&quot;,&quot;URL&quot;:&quot;http://arxiv.org/abs/2504.19874&quot;,&quot;author&quot;:[{&quot;family&quot;:&quot;Zandieh&quot;,&quot;given&quot;:&quot;Amir&quot;},{&quot;family&quot;:&quot;Daliri&quot;,&quot;given&quot;:&quot;Majid&quot;},{&quot;family&quot;:&quot;Hadian&quot;,&quot;given&quot;:&quot;Majid&quot;},{&quot;family&quot;:&quot;Mirrokni&quot;,&quot;given&quot;:&quot;Vahab&quot;}],&quot;accessed&quot;:{&quot;date-parts&quot;:[[&quot;2026&quot;,5,25]]},&quot;issued&quot;:{&quot;date-parts&quot;:[[&quot;2025&quot;,4,28]]}}}],&quot;schema&quot;:&quot;https://github.com/citation-style-language/schema/raw/master/csl-citation.json&quot;} RNDkKsmsbzrS1"/></text:p>
      <text:p text:style-name="P12"/>
      <text:p text:style-name="Standard"><text:span text:style-name="T16">A book called “</text:span><text:span text:style-name="T17">Hands-On ML Projects with OpenCV : Master Computer Vision and Machine Learning Using OpenCV and Python</text:span><text:span text:style-name="T18">” has excellent examples, tutorials, and guides how to make different machine visions. The book focuses on OpenCV (Open Source Computer Vision Library) is a free library that includes optimized algorithms for real-time image processing, machine learning, and computer vision, and it has python library for machine vision </text:span><text:reference-mark-start text:name="ZOTERO_ITEM CSL_CITATION {&quot;citationID&quot;:&quot;2xcvneHG&quot;,&quot;properties&quot;:{&quot;unsorted&quot;:false,&quot;formattedCitation&quot;:&quot;({\\i{}OpenCV: OpenCV modules}, no date)&quot;,&quot;plainCitation&quot;:&quot;(OpenCV: OpenCV modules, no date)&quot;,&quot;noteIndex&quot;:0},&quot;citationItems&quot;:[{&quot;id&quot;:12,&quot;uris&quot;:[&quot;http://zotero.org/users/local/KOoXlric/items/745QS2HL&quot;],&quot;itemData&quot;:{&quot;id&quot;:12,&quot;type&quot;:&quot;webpage&quot;,&quot;title&quot;:&quot;OpenCV: OpenCV modules&quot;,&quot;URL&quot;:&quot;https://docs.opencv.org/4.13.0/&quot;,&quot;accessed&quot;:{&quot;date-parts&quot;:[[&quot;2026&quot;,6,2]]}}}],&quot;schema&quot;:&quot;https://github.com/citation-style-language/schema/raw/master/csl-citation.json&quot;} RNDnPLHGSSjzf"/><text:span text:style-name="T14">(</text:span><text:span text:style-name="T15">OpenCV: OpenCV modules</text:span><text:span text:style-name="T14">, no date)</text:span><text:reference-mark-end text:name="ZOTERO_ITEM CSL_CITATION {&quot;citationID&quot;:&quot;2xcvneHG&quot;,&quot;properties&quot;:{&quot;unsorted&quot;:false,&quot;formattedCitation&quot;:&quot;({\\i{}OpenCV: OpenCV modules}, no date)&quot;,&quot;plainCitation&quot;:&quot;(OpenCV: OpenCV modules, no date)&quot;,&quot;noteIndex&quot;:0},&quot;citationItems&quot;:[{&quot;id&quot;:12,&quot;uris&quot;:[&quot;http://zotero.org/users/local/KOoXlric/items/745QS2HL&quot;],&quot;itemData&quot;:{&quot;id&quot;:12,&quot;type&quot;:&quot;webpage&quot;,&quot;title&quot;:&quot;OpenCV: OpenCV modules&quot;,&quot;URL&quot;:&quot;https://docs.opencv.org/4.13.0/&quot;,&quot;accessed&quot;:{&quot;date-parts&quot;:[[&quot;2026&quot;,6,2]]}}}],&quot;schema&quot;:&quot;https://github.com/citation-style-language/schema/raw/master/csl-citation.json&quot;} RNDnPLHGSSjzf"/>. <text:reference-mark-start text:name="ZOTERO_ITEM CSL_CITATION {&quot;citationID&quot;:&quot;SuMLceeB&quot;,&quot;properties&quot;:{&quot;unsorted&quot;:false,&quot;formattedCitation&quot;:&quot;(Mugesh, 2023)&quot;,&quot;plainCitation&quot;:&quot;(Mugesh, 2023)&quot;,&quot;noteIndex&quot;:0},&quot;citationItems&quot;:[{&quot;id&quot;:11,&quot;uris&quot;:[&quot;http://zotero.org/users/local/KOoXlric/items/E9N8UDZS&quot;],&quot;itemData&quot;:{&quot;id&quot;:11,&quot;type&quot;:&quot;book&quot;,&quot;edition&quot;:&quot;1&quot;,&quot;ISBN&quot;:&quot;978-93-88590-87-7&quot;,&quot;number-of-pages&quot;:&quot;146&quot;,&quot;publisher&quot;:&quot;Orange Education PVT Ltd&quot;,&quot;title&quot;:&quot;Hands-On ML Projects with OpenCV : Master Computer Vision and Machine Learning Using OpenCV and Python&quot;,&quot;URL&quot;:&quot;https://ebookcentral.proquest.com/lib/lut/detail.action?docID=30682670&quot;,&quot;author&quot;:[{&quot;family&quot;:&quot;Mugesh&quot;,&quot;given&quot;:&quot;S&quot;}],&quot;accessed&quot;:{&quot;date-parts&quot;:[[&quot;2026&quot;,6,2]]},&quot;issued&quot;:{&quot;date-parts&quot;:[[&quot;2023&quot;,8,9]]}}}],&quot;schema&quot;:&quot;https://github.com/citation-style-language/schema/raw/master/csl-citation.json&quot;} RNDoTMd0vKxGy"/>(Mugesh, 2023)<text:reference-mark-end text:name="ZOTERO_ITEM CSL_CITATION {&quot;citationID&quot;:&quot;SuMLceeB&quot;,&quot;properties&quot;:{&quot;unsorted&quot;:false,&quot;formattedCitation&quot;:&quot;(Mugesh, 2023)&quot;,&quot;plainCitation&quot;:&quot;(Mugesh, 2023)&quot;,&quot;noteIndex&quot;:0},&quot;citationItems&quot;:[{&quot;id&quot;:11,&quot;uris&quot;:[&quot;http://zotero.org/users/local/KOoXlric/items/E9N8UDZS&quot;],&quot;itemData&quot;:{&quot;id&quot;:11,&quot;type&quot;:&quot;book&quot;,&quot;edition&quot;:&quot;1&quot;,&quot;ISBN&quot;:&quot;978-93-88590-87-7&quot;,&quot;number-of-pages&quot;:&quot;146&quot;,&quot;publisher&quot;:&quot;Orange Education PVT Ltd&quot;,&quot;title&quot;:&quot;Hands-On ML Projects with OpenCV : Master Computer Vision and Machine Learning Using OpenCV and Python&quot;,&quot;URL&quot;:&quot;https://ebookcentral.proquest.com/lib/lut/detail.action?docID=30682670&quot;,&quot;author&quot;:[{&quot;family&quot;:&quot;Mugesh&quot;,&quot;given&quot;:&quot;S&quot;}],&quot;accessed&quot;:{&quot;date-parts&quot;:[[&quot;2026&quot;,6,2]]},&quot;issued&quot;:{&quot;date-parts&quot;:[[&quot;2023&quot;,8,9]]}}}],&quot;schema&quot;:&quot;https://github.com/citation-style-language/schema/raw/master/csl-citation.json&quot;} RNDoTMd0vKxGy"/></text:p>
      <text:p text:style-name="P12"/>
      <text:p text:style-name="P12"/>
      <text:p text:style-name="P13"><text:span text:style-name="T19">A book called “</text:span><text:span text:style-name="T20">Machine Vision Technology</text:span><text:span text:style-name="T19">” introduces machine vision </text:span><text:span text:style-name="T21">as improvement upon human vision. Humans aren’t capable to detect minor millimeter differences while machine vision can achieve precision of 0.001 mm or even higher. The book goes over how machine vision works in fine detail. </text:span><text:reference-mark-start text:name="ZOTERO_ITEM CSL_CITATION {&quot;citationID&quot;:&quot;Pz5l3IdK&quot;,&quot;properties&quot;:{&quot;unsorted&quot;:false,&quot;formattedCitation&quot;:&quot;(Chen and Chen, 2026)&quot;,&quot;plainCitation&quot;:&quot;(Chen and Chen, 2026)&quot;,&quot;noteIndex&quot;:0},&quot;citationItems&quot;:[{&quot;id&quot;:15,&quot;uris&quot;:[&quot;http://zotero.org/users/local/KOoXlric/items/KN72J522&quot;],&quot;itemData&quot;:{&quot;id&quot;:15,&quot;type&quot;:&quot;book&quot;,&quot;collection-title&quot;:&quot;Advanced and Intelligent Manufacturing in China&quot;,&quot;DOI&quot;:&quot;10.1007/978-981-95-1184-6&quot;,&quot;ISBN&quot;:&quot;9789819511839&quot;,&quot;language&quot;:&quot;en&quot;,&quot;license&quot;:&quot;https://www.springernature.com/gp/researchers/text-and-data-mining&quot;,&quot;publisher&quot;:&quot;Springer Nature Singapore&quot;,&quot;publisher-place&quot;:&quot;Singapore&quot;,&quot;source&quot;:&quot;DOI.org (Crossref)&quot;,&quot;title&quot;:&quot;Machine Vision Technology&quot;,&quot;URL&quot;:&quot;https://link.springer.com/10.1007/978-981-95-1184-6&quot;,&quot;author&quot;:[{&quot;family&quot;:&quot;Chen&quot;,&quot;given&quot;:&quot;Bingqi&quot;},{&quot;family&quot;:&quot;Chen&quot;,&quot;given&quot;:&quot;Siyao&quot;}],&quot;accessed&quot;:{&quot;date-parts&quot;:[[&quot;2026&quot;,6,2]]},&quot;issued&quot;:{&quot;date-parts&quot;:[[&quot;2026&quot;]]}}}],&quot;schema&quot;:&quot;https://github.com/citation-style-language/schema/raw/master/csl-citation.json&quot;} RND6KG58OUl63"/>(Chen and Chen, 2026)<text:reference-mark-end text:name="ZOTERO_ITEM CSL_CITATION {&quot;citationID&quot;:&quot;Pz5l3IdK&quot;,&quot;properties&quot;:{&quot;unsorted&quot;:false,&quot;formattedCitation&quot;:&quot;(Chen and Chen, 2026)&quot;,&quot;plainCitation&quot;:&quot;(Chen and Chen, 2026)&quot;,&quot;noteIndex&quot;:0},&quot;citationItems&quot;:[{&quot;id&quot;:15,&quot;uris&quot;:[&quot;http://zotero.org/users/local/KOoXlric/items/KN72J522&quot;],&quot;itemData&quot;:{&quot;id&quot;:15,&quot;type&quot;:&quot;book&quot;,&quot;collection-title&quot;:&quot;Advanced and Intelligent Manufacturing in China&quot;,&quot;DOI&quot;:&quot;10.1007/978-981-95-1184-6&quot;,&quot;ISBN&quot;:&quot;9789819511839&quot;,&quot;language&quot;:&quot;en&quot;,&quot;license&quot;:&quot;https://www.springernature.com/gp/researchers/text-and-data-mining&quot;,&quot;publisher&quot;:&quot;Springer Nature Singapore&quot;,&quot;publisher-place&quot;:&quot;Singapore&quot;,&quot;source&quot;:&quot;DOI.org (Crossref)&quot;,&quot;title&quot;:&quot;Machine Vision Technology&quot;,&quot;URL&quot;:&quot;https://link.springer.com/10.1007/978-981-95-1184-6&quot;,&quot;author&quot;:[{&quot;family&quot;:&quot;Chen&quot;,&quot;given&quot;:&quot;Bingqi&quot;},{&quot;family&quot;:&quot;Chen&quot;,&quot;given&quot;:&quot;Siyao&quot;}],&quot;accessed&quot;:{&quot;date-parts&quot;:[[&quot;2026&quot;,6,2]]},&quot;issued&quot;:{&quot;date-parts&quot;:[[&quot;2026&quot;]]}}}],&quot;schema&quot;:&quot;https://github.com/citation-style-language/schema/raw/master/csl-citation.json&quot;} RND6KG58OUl63"/></text:p>
      <text:p text:style-name="P12"/>
      <text:p text:style-name="P12"/>
      <text:p text:style-name="P12"/>
      <text:p text:style-name="P14">References:</text:p>
      <text:section text:style-name="Sect1" text:name="ZOTERO_BIBL {&quot;uncited&quot;:[],&quot;omitted&quot;:[],&quot;custom&quot;:[]} CSL_BIBLIOGRAPHY RNDE1VibUUFjC">
        <text:p text:style-name="Bibliography_20_1">Chen, B. and Chen, S. (2026) <text:span text:style-name="T22">Machine Vision Technology</text:span>. Singapore: Springer Nature Singapore (Advanced and Intelligent Manufacturing in China). Available at: https://doi.org/10.1007/978-981-95-1184-6.</text:p>
        <text:p text:style-name="Bibliography_20_1">Mugesh, S. (2023) <text:span text:style-name="T22">Hands-On ML Projects with OpenCV : Master Computer Vision and Machine Learning Using OpenCV and Python</text:span>. 1st edn. Orange Education PVT Ltd. Available at: https://ebookcentral.proquest.com/lib/lut/detail.action?docID=30682670 (Accessed: 2 June 2026).</text:p>
        <text:p text:style-name="Bibliography_20_1"><text:span text:style-name="T22">OpenCV: OpenCV modules</text:span> (no date). Available at: https://docs.opencv.org/4.13.0/ (Accessed: 2 June 2026).</text:p>
        <text:p text:style-name="Bibliography_20_1">Zandieh, A. <text:span text:style-name="T22">et al.</text:span> (2025) ‘TurboQuant: Online Vector Quantization with Near-optimal Distortion Rate’. arXiv. Available at: https://doi.org/10.48550/arXiv.2504.19874.</text:p>
      </text:section>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ibliography_20_1" style:display-name="Bibliography 1" style:family="paragraph" style:parent-style-name="Index" style:class="index">
      <style:paragraph-properties fo:margin-left="0in" fo:margin-top="0in" fo:margin-bottom="0.1665in" style:contextual-spacing="false" style:line-height-at-least="0.1665in" fo:text-indent="0in" style:auto-text-indent="false">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02T09:47:38.995583300</meta:creation-date>
    <dc:date>2026-06-02T10:50:52.384960000</dc:date>
    <meta:editing-duration>PT13M57S</meta:editing-duration>
    <meta:editing-cycles>6</meta:editing-cycles>
    <meta:generator>LibreOffice/25.8.6.2$Windows_X86_64 LibreOffice_project/b4b39682cd9868fa725bc664aff94278d315bd04</meta:generator>
    <meta:print-date>2026-06-02T10:50:59.268535700</meta:print-date>
    <meta:printed-by>PDF files</meta:printed-by>
    <meta:document-statistic meta:table-count="1" meta:image-count="0" meta:object-count="0" meta:page-count="2" meta:paragraph-count="69" meta:word-count="645" meta:character-count="4311" meta:non-whitespace-character-count="3733"/>
    <meta:user-defined meta:name="ZOTERO_PREF_1">&lt;data data-version="3" zotero-version="9.0.4"&gt;&lt;session id="dGoIrlJn"/&gt;&lt;style id="http://www.zotero.org/styles/oxford-brookes-university-harvard" hasBibliography="1" bibliographyStyleHasBeenSet="1"/&gt;&lt;prefs&gt;&lt;pref name="fieldType" value="ReferenceMark"/&gt;&lt;/pr</meta:user-defined>
    <meta:user-defined meta:name="ZOTERO_PREF_2">efs&gt;&lt;/data&gt;</meta:user-defined>
  </office:meta>
</office:document-meta>
</file>